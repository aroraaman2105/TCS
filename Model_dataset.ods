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MODEL NAME</text:p>
          </table:table-cell>
          <table:table-cell office:value-type="string" calcext:value-type="string">
            <text:p>Data Set Used</text:p>
          </table:table-cell>
          <table:table-cell office:value-type="string" calcext:value-type="string">
            <text:p>Domain of Data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hi-4-mini-instr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mba2-7b-instr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motron-h-4b-instruc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phi-4-mini-flash-reasoning</text:p>
          </table:table-cell>
          <table:table-cell office:value-type="string" calcext:value-type="string">
            <text:p>Slim Pajama</text:p>
            <text:p>ProLong-64k:</text:p>
            <text:p>Phi4-mini Corpus:</text:p>
            <text:p>Multi-Stage Distillation Data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-4-mini-reason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17:02:42.617474043</meta:creation-date>
    <dc:date>2026-07-01T17:43:33.047523052</dc:date>
    <meta:editing-duration>PT13M47S</meta:editing-duration>
    <meta:editing-cycles>1</meta:editing-cycles>
    <meta:document-statistic meta:table-count="1" meta:cell-count="9" meta:object-count="0"/>
    <meta:generator>LibreOffice/24.2.7.2$Linux_X86_64 LibreOffice_project/420$Build-2</meta:generator>
  </office:meta>
</office:document-meta>
</file>