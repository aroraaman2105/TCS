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automatic-styles>
    <style:style style:name="Table1" style:family="table">
      <style:table-properties style:width="6.6931in" table:align="margins"/>
    </style:style>
    <style:style style:name="Table1.A" style:family="table-column">
      <style:table-column-properties style:column-width="1.3382in" style:rel-column-width="13106*"/>
    </style:style>
    <style:style style:name="Table1.B" style:family="table-column">
      <style:table-column-properties style:column-width="1.3389in" style:rel-column-width="13107*"/>
    </style:style>
    <style:style style:name="Table1.E" style:family="table-column">
      <style:table-column-properties style:column-width="1.3389in" style:rel-column-width="13109*"/>
    </style:style>
    <style:style style:name="Table1.A1" style:family="table-cell">
      <style:table-cell-properties fo:padding="0.0382in" fo:border-left="0.5pt solid #000000" fo:border-right="none" fo:border-top="0.5pt solid #000000" fo:border-bottom="0.5pt solid #000000"/>
    </style:style>
    <style:style style:name="Table1.E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Table2" style:family="table">
      <style:table-properties style:width="6.6667in" table:align="left"/>
    </style:style>
    <style:style style:name="Table2.A" style:family="table-column">
      <style:table-column-properties style:column-width="1.341in"/>
    </style:style>
    <style:style style:name="Table2.B" style:family="table-column">
      <style:table-column-properties style:column-width="1.3424in"/>
    </style:style>
    <style:style style:name="Table2.D" style:family="table-column">
      <style:table-column-properties style:column-width="1.3215in"/>
    </style:style>
    <style:style style:name="Table2.E" style:family="table-column">
      <style:table-column-properties style:column-width="1.3208in"/>
    </style:style>
    <style:style style:name="Table2.A1" style:family="table-cell">
      <style:table-cell-properties fo:padding="0.0382in" fo:border-left="0.5pt solid #000000" fo:border-right="none" fo:border-top="0.5pt solid #000000" fo:border-bottom="0.5pt solid #000000"/>
    </style:style>
    <style:style style:name="Table2.E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E2" style:family="table-cell">
      <style:table-cell-properties fo:padding="0.0382in" fo:border-left="0.5pt solid #000000" fo:border-right="0.5pt solid #000000" fo:border-top="none" fo:border-bottom="0.5pt solid #000000"/>
    </style:style>
    <style:style style:name="Table2.4" style:family="table-row">
      <style:table-row-properties style:min-row-height="0.3028in"/>
    </style:style>
    <style:style style:name="Table2.7" style:family="table-row">
      <style:table-row-properties style:min-row-height="0.3236in"/>
    </style:style>
    <style:style style:name="Table3" style:family="table">
      <style:table-properties style:width="6.6931in" table:align="margins"/>
    </style:style>
    <style:style style:name="Table3.A" style:family="table-column">
      <style:table-column-properties style:column-width="1.3382in" style:rel-column-width="13106*"/>
    </style:style>
    <style:style style:name="Table3.B" style:family="table-column">
      <style:table-column-properties style:column-width="1.3389in" style:rel-column-width="13107*"/>
    </style:style>
    <style:style style:name="Table3.E" style:family="table-column">
      <style:table-column-properties style:column-width="1.3389in" style:rel-column-width="13109*"/>
    </style:style>
    <style:style style:name="Table3.A1" style:family="table-cell">
      <style:table-cell-properties fo:padding="0.0382in" fo:border-left="0.5pt solid #000000" fo:border-right="none" fo:border-top="0.5pt solid #000000" fo:border-bottom="0.5pt solid #000000"/>
    </style:style>
    <style:style style:name="Table3.E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E2" style:family="table-cell">
      <style:table-cell-properties fo:padding="0.0382in" fo:border-left="0.5pt solid #000000" fo:border-right="0.5pt solid #000000" fo:border-top="none" fo:border-bottom="0.5pt solid #000000"/>
    </style:style>
    <style:style style:name="Table3.4" style:family="table-row">
      <style:table-row-properties style:min-row-height="0.3028in"/>
    </style:style>
    <style:style style:name="Table5" style:family="table">
      <style:table-properties style:width="6.6931in" table:align="margins"/>
    </style:style>
    <style:style style:name="Table5.A" style:family="table-column">
      <style:table-column-properties style:column-width="1.3382in" style:rel-column-width="13106*"/>
    </style:style>
    <style:style style:name="Table5.B" style:family="table-column">
      <style:table-column-properties style:column-width="1.3389in" style:rel-column-width="13107*"/>
    </style:style>
    <style:style style:name="Table5.E" style:family="table-column">
      <style:table-column-properties style:column-width="1.3389in" style:rel-column-width="13109*"/>
    </style:style>
    <style:style style:name="Table5.A1" style:family="table-cell">
      <style:table-cell-properties fo:padding="0.0382in" fo:border-left="0.5pt solid #000000" fo:border-right="none" fo:border-top="0.5pt solid #000000" fo:border-bottom="0.5pt solid #000000"/>
    </style:style>
    <style:style style:name="Table5.E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E2" style:family="table-cell">
      <style:table-cell-properties fo:padding="0.0382in" fo:border-left="0.5pt solid #000000" fo:border-right="0.5pt solid #000000" fo:border-top="none" fo:border-bottom="0.5pt solid #000000"/>
    </style:style>
    <style:style style:name="Table5.4" style:family="table-row">
      <style:table-row-properties style:min-row-height="0.3028in"/>
    </style:style>
    <style:style style:name="Table6" style:family="table">
      <style:table-properties style:width="6.6931in" table:align="margins"/>
    </style:style>
    <style:style style:name="Table6.A" style:family="table-column">
      <style:table-column-properties style:column-width="1.3382in" style:rel-column-width="13106*"/>
    </style:style>
    <style:style style:name="Table6.B" style:family="table-column">
      <style:table-column-properties style:column-width="1.3389in" style:rel-column-width="13107*"/>
    </style:style>
    <style:style style:name="Table6.E" style:family="table-column">
      <style:table-column-properties style:column-width="1.3389in" style:rel-column-width="13109*"/>
    </style:style>
    <style:style style:name="Table6.A1" style:family="table-cell">
      <style:table-cell-properties fo:padding="0.0382in" fo:border-left="0.5pt solid #000000" fo:border-right="none" fo:border-top="0.5pt solid #000000" fo:border-bottom="0.5pt solid #000000"/>
    </style:style>
    <style:style style:name="Table6.E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E2" style:family="table-cell">
      <style:table-cell-properties fo:padding="0.0382in" fo:border-left="0.5pt solid #000000" fo:border-right="0.5pt solid #000000" fo:border-top="none" fo:border-bottom="0.5pt solid #000000"/>
    </style:style>
    <style:style style:name="Table6.4" style:family="table-row">
      <style:table-row-properties style:min-row-height="0.3028in"/>
    </style:style>
    <style:style style:name="Table4" style:family="table">
      <style:table-properties style:width="6.6931in" table:align="margins"/>
    </style:style>
    <style:style style:name="Table4.A" style:family="table-column">
      <style:table-column-properties style:column-width="1.3382in" style:rel-column-width="13106*"/>
    </style:style>
    <style:style style:name="Table4.B" style:family="table-column">
      <style:table-column-properties style:column-width="1.3389in" style:rel-column-width="13107*"/>
    </style:style>
    <style:style style:name="Table4.E" style:family="table-column">
      <style:table-column-properties style:column-width="1.3389in" style:rel-column-width="13109*"/>
    </style:style>
    <style:style style:name="Table4.A1" style:family="table-cell">
      <style:table-cell-properties fo:padding="0.0382in" fo:border-left="0.5pt solid #000000" fo:border-right="none" fo:border-top="0.5pt solid #000000" fo:border-bottom="0.5pt solid #000000"/>
    </style:style>
    <style:style style:name="Table4.E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E2" style:family="table-cell">
      <style:table-cell-properties fo:padding="0.0382in" fo:border-left="0.5pt solid #000000" fo:border-right="0.5pt solid #000000" fo:border-top="none" fo:border-bottom="0.5pt solid #000000"/>
    </style:style>
    <style:style style:name="Table4.4" style:family="table-row">
      <style:table-row-properties style:min-row-height="0.3028in"/>
    </style:style>
    <style:style style:name="Table7" style:family="table">
      <style:table-properties style:width="6.6931in" table:align="margins"/>
    </style:style>
    <style:style style:name="Table7.A" style:family="table-column">
      <style:table-column-properties style:column-width="1.3382in" style:rel-column-width="13106*"/>
    </style:style>
    <style:style style:name="Table7.B" style:family="table-column">
      <style:table-column-properties style:column-width="1.3389in" style:rel-column-width="13107*"/>
    </style:style>
    <style:style style:name="Table7.E" style:family="table-column">
      <style:table-column-properties style:column-width="1.3389in" style:rel-column-width="13109*"/>
    </style:style>
    <style:style style:name="Table7.A1" style:family="table-cell">
      <style:table-cell-properties fo:padding="0.0382in" fo:border-left="0.5pt solid #000000" fo:border-right="none" fo:border-top="0.5pt solid #000000" fo:border-bottom="0.5pt solid #000000"/>
    </style:style>
    <style:style style:name="Table7.E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E2" style:family="table-cell">
      <style:table-cell-properties fo:padding="0.0382in" fo:border-left="0.5pt solid #000000" fo:border-right="0.5pt solid #000000" fo:border-top="none" fo:border-bottom="0.5pt solid #000000"/>
    </style:style>
    <style:style style:name="Table7.4" style:family="table-row">
      <style:table-row-properties style:min-row-height="0.3028in"/>
    </style:style>
    <style:style style:name="P1" style:family="paragraph" style:parent-style-name="Standard">
      <style:text-properties officeooo:rsid="001f1762" officeooo:paragraph-rsid="001f1762"/>
    </style:style>
    <style:style style:name="P2" style:family="paragraph" style:parent-style-name="Standard">
      <style:text-properties fo:font-weight="normal" officeooo:rsid="003dbba5" officeooo:paragraph-rsid="003dbba5" style:font-weight-asian="normal" style:font-weight-complex="normal"/>
    </style:style>
    <style:style style:name="P3" style:family="paragraph" style:parent-style-name="Standard">
      <style:text-properties fo:font-weight="normal" officeooo:rsid="00466fbd" officeooo:paragraph-rsid="00466fbd" style:font-weight-asian="normal" style:font-weight-complex="normal"/>
    </style:style>
    <style:style style:name="P4" style:family="paragraph" style:parent-style-name="Standard">
      <style:text-properties fo:font-weight="normal" officeooo:rsid="0047f5a5" officeooo:paragraph-rsid="0047f5a5" style:font-weight-asian="normal" style:font-weight-complex="normal"/>
    </style:style>
    <style:style style:name="P5" style:family="paragraph" style:parent-style-name="Standard">
      <style:text-properties fo:font-weight="normal" officeooo:rsid="0049f376" officeooo:paragraph-rsid="0049f376" style:font-weight-asian="normal" style:font-weight-complex="normal"/>
    </style:style>
    <style:style style:name="P6" style:family="paragraph" style:parent-style-name="Standard">
      <style:text-properties fo:font-weight="normal" officeooo:rsid="005287fc" officeooo:paragraph-rsid="005287fc" style:font-weight-asian="normal" style:font-weight-complex="normal"/>
    </style:style>
    <style:style style:name="P7" style:family="paragraph" style:parent-style-name="Standard">
      <style:text-properties fo:font-weight="normal" officeooo:rsid="005287fc" officeooo:paragraph-rsid="005287fc" fo:background-color="transparent" style:font-weight-asian="normal" style:font-weight-complex="normal"/>
    </style:style>
    <style:style style:name="P8" style:family="paragraph" style:parent-style-name="Standard">
      <style:text-properties style:text-underline-style="solid" style:text-underline-width="auto" style:text-underline-color="font-color" officeooo:rsid="0038bd74" officeooo:paragraph-rsid="0038bd74"/>
    </style:style>
    <style:style style:name="P9" style:family="paragraph" style:parent-style-name="Standard">
      <style:text-properties style:text-underline-style="solid" style:text-underline-width="auto" style:text-underline-color="font-color" officeooo:rsid="0038bd74" officeooo:paragraph-rsid="0038bd74" fo:background-color="#dee6ef"/>
    </style:style>
    <style:style style:name="P10" style:family="paragraph" style:parent-style-name="Standard">
      <style:text-properties style:text-underline-style="solid" style:text-underline-width="auto" style:text-underline-color="font-color" officeooo:rsid="00320c8e" officeooo:paragraph-rsid="00320c8e" fo:background-color="#dee6ef"/>
    </style:style>
    <style:style style:name="P11" style:family="paragraph" style:parent-style-name="Standard">
      <style:text-properties style:text-underline-style="solid" style:text-underline-width="auto" style:text-underline-color="font-color" officeooo:rsid="00466fbd" officeooo:paragraph-rsid="00466fbd" fo:background-color="#dee6ef"/>
    </style:style>
    <style:style style:name="P12" style:family="paragraph" style:parent-style-name="Standard">
      <style:text-properties style:text-underline-style="solid" style:text-underline-width="auto" style:text-underline-color="font-color" fo:font-weight="normal" officeooo:rsid="0049f376" officeooo:paragraph-rsid="0049f376" fo:background-color="#dee6ef" style:font-weight-asian="normal" style:font-weight-complex="normal"/>
    </style:style>
    <style:style style:name="P13" style:family="paragraph" style:parent-style-name="Standard">
      <style:text-properties style:text-underline-style="solid" style:text-underline-width="auto" style:text-underline-color="font-color" fo:font-weight="normal" officeooo:rsid="0047f5a5" officeooo:paragraph-rsid="0047f5a5" fo:background-color="#dee6ef" style:font-weight-asian="normal" style:font-weight-complex="normal"/>
    </style:style>
    <style:style style:name="P14" style:family="paragraph" style:parent-style-name="Standard">
      <style:text-properties style:text-underline-style="solid" style:text-underline-width="auto" style:text-underline-color="font-color" fo:font-weight="normal" officeooo:rsid="00466fbd" officeooo:paragraph-rsid="00466fbd" fo:background-color="#dee6ef" style:font-weight-asian="normal" style:font-weight-complex="normal"/>
    </style:style>
    <style:style style:name="P15" style:family="paragraph" style:parent-style-name="Standard">
      <style:text-properties style:text-underline-style="none" officeooo:rsid="00274ee3" officeooo:paragraph-rsid="00274ee3"/>
    </style:style>
    <style:style style:name="P16" style:family="paragraph" style:parent-style-name="Standard">
      <style:text-properties style:text-underline-style="none" officeooo:rsid="0038bd74" officeooo:paragraph-rsid="0038bd74"/>
    </style:style>
    <style:style style:name="P17" style:family="paragraph" style:parent-style-name="Standard">
      <style:text-properties officeooo:paragraph-rsid="00274ee3"/>
    </style:style>
    <style:style style:name="P18" style:family="paragraph" style:parent-style-name="Standard">
      <style:text-properties officeooo:rsid="0027ae3c" officeooo:paragraph-rsid="0027ae3c"/>
    </style:style>
    <style:style style:name="P19" style:family="paragraph" style:parent-style-name="Standard">
      <style:text-properties officeooo:rsid="002b4a45" officeooo:paragraph-rsid="002b4a45"/>
    </style:style>
    <style:style style:name="P20" style:family="paragraph" style:parent-style-name="Standard">
      <style:text-properties officeooo:rsid="002b4a45" officeooo:paragraph-rsid="0030b85b"/>
    </style:style>
    <style:style style:name="P21" style:family="paragraph" style:parent-style-name="Standard">
      <style:text-properties officeooo:rsid="002ffbe2" officeooo:paragraph-rsid="003ce48c"/>
    </style:style>
    <style:style style:name="P22" style:family="paragraph" style:parent-style-name="Standard">
      <style:text-properties officeooo:paragraph-rsid="002ffbe2"/>
    </style:style>
    <style:style style:name="P23" style:family="paragraph" style:parent-style-name="Standard">
      <style:text-properties officeooo:rsid="0030b85b" officeooo:paragraph-rsid="002ffbe2"/>
    </style:style>
    <style:style style:name="P24" style:family="paragraph" style:parent-style-name="Standard">
      <style:text-properties officeooo:rsid="0030b85b" officeooo:paragraph-rsid="0030b85b"/>
    </style:style>
    <style:style style:name="P25" style:family="paragraph" style:parent-style-name="Standard">
      <style:text-properties officeooo:paragraph-rsid="0030b85b"/>
    </style:style>
    <style:style style:name="P26" style:family="paragraph" style:parent-style-name="Standard">
      <style:text-properties officeooo:rsid="0030b85b" officeooo:paragraph-rsid="0030b85b" fo:background-color="#ffffff"/>
    </style:style>
    <style:style style:name="P27" style:family="paragraph" style:parent-style-name="Standard">
      <style:text-properties officeooo:rsid="0030b85b" officeooo:paragraph-rsid="003aa9a9" fo:background-color="#ffffff"/>
    </style:style>
    <style:style style:name="P28" style:family="paragraph" style:parent-style-name="Standard">
      <style:text-properties officeooo:rsid="00320c8e" officeooo:paragraph-rsid="00320c8e" fo:background-color="#ffffff"/>
    </style:style>
    <style:style style:name="P29" style:family="paragraph" style:parent-style-name="Standard">
      <style:text-properties officeooo:rsid="003cb1c9" officeooo:paragraph-rsid="003cb1c9" fo:background-color="#ffffff"/>
    </style:style>
    <style:style style:name="P30" style:family="paragraph" style:parent-style-name="Standard">
      <style:text-properties officeooo:rsid="00411c6d" officeooo:paragraph-rsid="00411c6d" fo:background-color="#ffffff"/>
    </style:style>
    <style:style style:name="P31" style:family="paragraph" style:parent-style-name="Standard">
      <style:text-properties style:font-name="Liberation Serif" fo:font-size="12pt" style:text-underline-style="solid" style:text-underline-width="auto" style:text-underline-color="font-color" officeooo:rsid="0030b85b" officeooo:paragraph-rsid="0030b85b" fo:background-color="#dee6ef" style:font-size-asian="12pt" style:font-size-complex="12pt"/>
    </style:style>
    <style:style style:name="P32" style:family="paragraph" style:parent-style-name="Standard">
      <style:text-properties style:font-name="Liberation Serif" fo:font-size="12pt" style:text-underline-style="solid" style:text-underline-width="auto" style:text-underline-color="font-color" officeooo:rsid="00320c8e" officeooo:paragraph-rsid="00320c8e" fo:background-color="#dee6ef" style:font-size-asian="12pt" style:font-size-complex="12pt"/>
    </style:style>
    <style:style style:name="P33" style:family="paragraph" style:parent-style-name="Standard">
      <style:text-properties style:font-name="Liberation Serif" fo:font-size="12pt" style:text-underline-style="solid" style:text-underline-width="auto" style:text-underline-color="font-color" officeooo:rsid="004005a4" officeooo:paragraph-rsid="004005a4" fo:background-color="#dee6ef" style:font-size-asian="10.5pt" style:font-size-complex="12pt"/>
    </style:style>
    <style:style style:name="P34" style:family="paragraph" style:parent-style-name="Standard">
      <style:text-properties style:font-name="Liberation Serif" fo:font-size="12pt" officeooo:rsid="0030b85b" officeooo:paragraph-rsid="0030b85b" fo:background-color="#dee6ef" style:font-size-asian="12pt" style:font-size-complex="12pt"/>
    </style:style>
    <style:style style:name="P35" style:family="paragraph" style:parent-style-name="Standard">
      <style:text-properties style:font-name="Liberation Serif" fo:font-size="12pt" fo:font-weight="bold" officeooo:rsid="003dbba5" officeooo:paragraph-rsid="003dbba5" fo:background-color="#ffffd7" style:font-size-asian="12pt" style:font-weight-asian="bold" style:font-size-complex="12pt" style:font-weight-complex="bold"/>
    </style:style>
    <style:style style:name="P36" style:family="paragraph" style:parent-style-name="Standard">
      <style:text-properties officeooo:rsid="0038a29f" officeooo:paragraph-rsid="0038a29f"/>
    </style:style>
    <style:style style:name="P37" style:family="paragraph" style:parent-style-name="Standard">
      <style:text-properties officeooo:rsid="0038bd74" officeooo:paragraph-rsid="0038bd74"/>
    </style:style>
    <style:style style:name="P38" style:family="paragraph" style:parent-style-name="Standard">
      <style:text-properties officeooo:rsid="00320c8e" officeooo:paragraph-rsid="00320c8e" fo:background-color="#dee6ef"/>
    </style:style>
    <style:style style:name="P39" style:family="paragraph" style:parent-style-name="Standard">
      <style:text-properties fo:font-weight="bold" officeooo:rsid="003dbba5" officeooo:paragraph-rsid="003dbba5" style:font-weight-asian="bold" style:font-weight-complex="bold"/>
    </style:style>
    <style:style style:name="P40" style:family="paragraph" style:parent-style-name="Standard">
      <style:text-properties fo:font-weight="bold" officeooo:rsid="004da52a" officeooo:paragraph-rsid="004da52a" style:font-weight-asian="bold" style:font-weight-complex="bold"/>
    </style:style>
    <style:style style:name="P41" style:family="paragraph" style:parent-style-name="Standard">
      <style:text-properties fo:font-weight="bold" officeooo:rsid="003dbba5" officeooo:paragraph-rsid="003dbba5" fo:background-color="#ffffd7" style:font-weight-asian="bold" style:font-weight-complex="bold"/>
    </style:style>
    <style:style style:name="P42" style:family="paragraph" style:parent-style-name="Standard">
      <style:text-properties fo:font-weight="bold" officeooo:rsid="003dbba5" officeooo:paragraph-rsid="004dfdfd" fo:background-color="#ffffd7" style:font-weight-asian="bold" style:font-weight-complex="bold"/>
    </style:style>
    <style:style style:name="P43" style:family="paragraph" style:parent-style-name="Standard">
      <style:text-properties fo:font-weight="bold" officeooo:rsid="00501214" officeooo:paragraph-rsid="00501214" fo:background-color="#ffffd7" style:font-weight-asian="bold" style:font-weight-complex="bold"/>
    </style:style>
    <style:style style:name="P44" style:family="paragraph" style:parent-style-name="Standard">
      <style:text-properties fo:font-weight="bold" officeooo:rsid="00538be6" officeooo:paragraph-rsid="00538be6" fo:background-color="#ffffd7" style:font-weight-asian="bold" style:font-weight-complex="bold"/>
    </style:style>
    <style:style style:name="P45" style:family="paragraph" style:parent-style-name="Standard">
      <style:text-properties fo:font-weight="bold" officeooo:rsid="00538be6" officeooo:paragraph-rsid="00558c0a" fo:background-color="#ffffd7" style:font-weight-asian="bold" style:font-weight-complex="bold"/>
    </style:style>
    <style:style style:name="P46" style:family="paragraph" style:parent-style-name="Standard">
      <style:text-properties fo:font-weight="bold" officeooo:rsid="004da52a" officeooo:paragraph-rsid="004da52a" fo:background-color="transparent" style:font-weight-asian="bold" style:font-weight-complex="bold"/>
    </style:style>
    <style:style style:name="P47" style:family="paragraph" style:parent-style-name="Standard">
      <style:text-properties fo:font-weight="bold" officeooo:rsid="004dfdfd" officeooo:paragraph-rsid="004dfdfd" fo:background-color="transparent" style:font-weight-asian="bold" style:font-weight-complex="bold"/>
    </style:style>
    <style:style style:name="P48" style:family="paragraph" style:parent-style-name="Standard">
      <style:text-properties fo:font-weight="bold" officeooo:rsid="003dbba5" officeooo:paragraph-rsid="003dbba5" fo:background-color="transparent" style:font-weight-asian="bold" style:font-weight-complex="bold"/>
    </style:style>
    <style:style style:name="P49" style:family="paragraph" style:parent-style-name="Standard">
      <style:text-properties officeooo:paragraph-rsid="003eace7"/>
    </style:style>
    <style:style style:name="P50" style:family="paragraph" style:parent-style-name="Standard">
      <style:text-properties officeooo:rsid="00477f08" officeooo:paragraph-rsid="00477f08"/>
    </style:style>
    <style:style style:name="P51" style:family="paragraph" style:parent-style-name="Standard">
      <style:text-properties fo:color="#000000" loext:opacity="100%" fo:font-weight="bold" officeooo:rsid="00538be6" officeooo:paragraph-rsid="00538be6" fo:background-color="transparent" style:font-weight-asian="bold" style:font-weight-complex="bold"/>
    </style:style>
    <style:style style:name="P52" style:family="paragraph" style:parent-style-name="Standard">
      <style:text-properties fo:color="#000000" loext:opacity="100%" style:font-name="Droid Sans Mono" fo:font-size="10.5pt" fo:font-weight="normal" officeooo:rsid="00538be6" officeooo:paragraph-rsid="00538be6" fo:background-color="#ffffd7" style:font-weight-asian="bold" style:font-weight-complex="bold"/>
    </style:style>
    <style:style style:name="P53" style:family="paragraph" style:parent-style-name="Standard">
      <style:paragraph-properties fo:margin-left="0in" fo:margin-right="0in" style:line-height-at-least="0.198in" fo:text-indent="0in" style:auto-text-indent="false"/>
      <style:text-properties fo:color="#000000" loext:opacity="100%" style:font-name="Droid Sans Mono" fo:font-size="10.5pt" fo:font-weight="normal" fo:background-color="#ffffd7"/>
    </style:style>
    <style:style style:name="P54" style:family="paragraph" style:parent-style-name="Standard">
      <style:paragraph-properties style:line-height-at-least="0.198in"/>
      <style:text-properties fo:color="#000000" loext:opacity="100%" fo:background-color="#ffffd7"/>
    </style:style>
    <style:style style:name="P55" style:family="paragraph" style:parent-style-name="Table_20_Contents">
      <style:text-properties officeooo:rsid="003aa9a9" officeooo:paragraph-rsid="003aa9a9"/>
    </style:style>
    <style:style style:name="P56" style:family="paragraph" style:parent-style-name="Table_20_Contents">
      <style:text-properties officeooo:rsid="003aa9a9" officeooo:paragraph-rsid="003ce48c"/>
    </style:style>
    <style:style style:name="P57" style:family="paragraph" style:parent-style-name="Table_20_Contents">
      <style:text-properties officeooo:rsid="003aa9a9" officeooo:paragraph-rsid="004dfdfd"/>
    </style:style>
    <style:style style:name="P58" style:family="paragraph" style:parent-style-name="Table_20_Contents">
      <style:text-properties officeooo:rsid="003aa9a9" officeooo:paragraph-rsid="00558c0a"/>
    </style:style>
    <style:style style:name="P59" style:family="paragraph" style:parent-style-name="Table_20_Contents">
      <style:text-properties officeooo:paragraph-rsid="003aa9a9"/>
    </style:style>
    <style:style style:name="P60" style:family="paragraph" style:parent-style-name="Table_20_Contents">
      <style:text-properties officeooo:rsid="003b4598" officeooo:paragraph-rsid="003b4598"/>
    </style:style>
    <style:style style:name="P61" style:family="paragraph" style:parent-style-name="Table_20_Contents">
      <style:text-properties officeooo:rsid="003b4598" officeooo:paragraph-rsid="003ce48c"/>
    </style:style>
    <style:style style:name="P62" style:family="paragraph" style:parent-style-name="Table_20_Contents">
      <style:text-properties officeooo:rsid="003b4598" officeooo:paragraph-rsid="004dfdfd"/>
    </style:style>
    <style:style style:name="P63" style:family="paragraph" style:parent-style-name="Table_20_Contents">
      <style:text-properties officeooo:rsid="003b4598" officeooo:paragraph-rsid="00558c0a"/>
    </style:style>
    <style:style style:name="P64" style:family="paragraph" style:parent-style-name="Table_20_Contents">
      <style:text-properties officeooo:rsid="003cb1c9" officeooo:paragraph-rsid="003cb1c9"/>
    </style:style>
    <style:style style:name="P65" style:family="paragraph" style:parent-style-name="Table_20_Contents">
      <style:text-properties officeooo:rsid="003cb1c9" officeooo:paragraph-rsid="003ce48c"/>
    </style:style>
    <style:style style:name="P66" style:family="paragraph" style:parent-style-name="Table_20_Contents">
      <style:text-properties officeooo:paragraph-rsid="003ce48c"/>
    </style:style>
    <style:style style:name="P67" style:family="paragraph" style:parent-style-name="Table_20_Contents">
      <style:text-properties officeooo:rsid="003ce48c" officeooo:paragraph-rsid="003ce48c"/>
    </style:style>
    <style:style style:name="P68" style:family="paragraph" style:parent-style-name="Table_20_Contents">
      <style:text-properties officeooo:rsid="0040760a" officeooo:paragraph-rsid="0040760a"/>
    </style:style>
    <style:style style:name="P69" style:family="paragraph" style:parent-style-name="Table_20_Contents">
      <style:text-properties officeooo:rsid="00413bb4" officeooo:paragraph-rsid="00413bb4"/>
    </style:style>
    <style:style style:name="P70" style:family="paragraph" style:parent-style-name="Table_20_Contents">
      <style:text-properties officeooo:rsid="00413bb4" officeooo:paragraph-rsid="004dfdfd"/>
    </style:style>
    <style:style style:name="P71" style:family="paragraph" style:parent-style-name="Table_20_Contents">
      <style:text-properties officeooo:rsid="00413bb4" officeooo:paragraph-rsid="00558c0a"/>
    </style:style>
    <style:style style:name="P72" style:family="paragraph" style:parent-style-name="Table_20_Contents">
      <style:text-properties officeooo:rsid="00466fbd" officeooo:paragraph-rsid="00466fbd"/>
    </style:style>
    <style:style style:name="P73" style:family="paragraph" style:parent-style-name="Table_20_Contents">
      <style:text-properties officeooo:paragraph-rsid="004dfdfd"/>
    </style:style>
    <style:style style:name="P74" style:family="paragraph" style:parent-style-name="Table_20_Contents">
      <style:text-properties officeooo:rsid="004dfdfd" officeooo:paragraph-rsid="004dfdfd"/>
    </style:style>
    <style:style style:name="P75" style:family="paragraph" style:parent-style-name="Table_20_Contents">
      <style:text-properties officeooo:rsid="004dfdfd" officeooo:paragraph-rsid="00558c0a"/>
    </style:style>
    <style:style style:name="P76" style:family="paragraph" style:parent-style-name="Table_20_Contents">
      <style:text-properties officeooo:rsid="00558c0a" officeooo:paragraph-rsid="00558c0a"/>
    </style:style>
    <style:style style:name="P77" style:family="paragraph" style:parent-style-name="Table_20_Contents">
      <style:text-properties officeooo:paragraph-rsid="00558c0a"/>
    </style:style>
    <style:style style:name="P78" style:family="paragraph" style:parent-style-name="Standard" style:list-style-name="L3">
      <style:text-properties fo:color="#000000" loext:opacity="100%" style:font-name="Droid Sans Mono" fo:font-size="10.5pt" fo:font-weight="normal" officeooo:rsid="003cb1c9" officeooo:paragraph-rsid="003cb1c9" fo:background-color="#ffffff"/>
    </style:style>
    <style:style style:name="P79" style:family="paragraph" style:parent-style-name="Standard">
      <style:text-properties fo:color="#000000" loext:opacity="100%" style:font-name="Droid Sans Mono" fo:font-size="10.5pt" fo:font-weight="normal" officeooo:rsid="00320c8e" officeooo:paragraph-rsid="00320c8e" fo:background-color="#ffffff"/>
    </style:style>
    <style:style style:name="P80" style:family="paragraph" style:parent-style-name="Standard">
      <style:text-properties fo:color="#000000" loext:opacity="100%" style:font-name="Droid Sans Mono" fo:font-size="10.5pt" fo:font-weight="normal" officeooo:rsid="003374e5" officeooo:paragraph-rsid="00320c8e" fo:background-color="#ffffff"/>
    </style:style>
    <style:style style:name="P81" style:family="paragraph" style:parent-style-name="Standard">
      <style:text-properties fo:color="#000000" loext:opacity="100%" style:font-name="Droid Sans Mono" fo:font-size="10.5pt" fo:font-weight="normal" officeooo:rsid="0030b85b" officeooo:paragraph-rsid="0030b85b" fo:background-color="#ffffff"/>
    </style:style>
    <style:style style:name="P82" style:family="paragraph" style:parent-style-name="Standard">
      <style:text-properties fo:color="#000000" loext:opacity="100%" style:font-name="Droid Sans Mono" fo:font-size="10.5pt" fo:font-weight="normal" officeooo:rsid="00411c6d" officeooo:paragraph-rsid="00411c6d" fo:background-color="#ffffff"/>
    </style:style>
    <style:style style:name="P83" style:family="paragraph" style:parent-style-name="Standard">
      <style:text-properties fo:color="#000000" loext:opacity="100%" style:font-name="Droid Sans Mono" fo:font-size="10.5pt" fo:font-weight="normal" officeooo:rsid="0027ae3c" officeooo:paragraph-rsid="003aa9a9"/>
    </style:style>
    <style:style style:name="P84" style:family="paragraph" style:parent-style-name="Standard">
      <style:text-properties fo:color="#000000" loext:opacity="100%" style:font-name="Droid Sans Mono" fo:font-size="10.5pt" fo:font-weight="normal" officeooo:rsid="005287fc" officeooo:paragraph-rsid="005287fc" fo:background-color="transparent"/>
    </style:style>
    <style:style style:name="P85" style:family="paragraph" style:parent-style-name="Standard">
      <style:text-properties fo:color="#000000" loext:opacity="100%" style:font-name="Droid Sans Mono" fo:font-size="10.5pt" fo:font-weight="normal" officeooo:rsid="00538be6" officeooo:paragraph-rsid="00538be6" fo:background-color="#ffffd7" style:font-weight-asian="bold" style:font-weight-complex="bold"/>
    </style:style>
    <style:style style:name="P86" style:family="paragraph" style:parent-style-name="Standard">
      <style:text-properties fo:color="#000000" loext:opacity="100%" style:font-name="Droid Sans Mono" fo:font-size="10.5pt" style:text-underline-style="solid" style:text-underline-width="auto" style:text-underline-color="font-color" fo:font-weight="normal" officeooo:rsid="00411c6d" officeooo:paragraph-rsid="00411c6d" fo:background-color="#dee6ef"/>
    </style:style>
    <style:style style:name="P87" style:family="paragraph" style:parent-style-name="Standard">
      <style:text-properties fo:color="#000000" loext:opacity="100%" style:font-name="Liberation Serif" fo:font-size="12pt" fo:font-weight="normal" officeooo:rsid="004005a4" officeooo:paragraph-rsid="004005a4" fo:background-color="#ffffff" style:font-size-asian="10.5pt" style:font-size-complex="12pt"/>
    </style:style>
    <style:style style:name="P88" style:family="paragraph" style:parent-style-name="Standard" style:list-style-name="L6">
      <style:text-properties officeooo:rsid="0036d897" officeooo:paragraph-rsid="005e2ab5"/>
    </style:style>
    <style:style style:name="P89" style:family="paragraph" style:parent-style-name="Standard">
      <style:text-properties officeooo:rsid="0036d897" officeooo:paragraph-rsid="005e2ab5"/>
    </style:style>
    <style:style style:name="P90" style:family="paragraph" style:parent-style-name="Standard">
      <style:text-properties style:text-underline-style="solid" style:text-underline-width="auto" style:text-underline-color="font-color" fo:font-weight="normal" officeooo:rsid="004da52a" officeooo:paragraph-rsid="004da52a" fo:background-color="#dee6ef" style:font-weight-asian="normal" style:font-weight-complex="normal"/>
    </style:style>
    <style:style style:name="P91" style:family="paragraph" style:parent-style-name="Standard">
      <style:text-properties style:text-underline-style="solid" style:text-underline-width="auto" style:text-underline-color="font-color" fo:font-weight="normal" officeooo:rsid="004dfdfd" officeooo:paragraph-rsid="004dfdfd" fo:background-color="#dee6ef" style:font-weight-asian="normal" style:font-weight-complex="normal"/>
    </style:style>
    <style:style style:name="P92" style:family="paragraph" style:parent-style-name="Standard">
      <style:text-properties fo:font-weight="normal" officeooo:rsid="004da52a" officeooo:paragraph-rsid="004da52a" fo:background-color="transparent" style:font-weight-asian="normal" style:font-weight-complex="normal"/>
    </style:style>
    <style:style style:name="P93" style:family="paragraph" style:parent-style-name="Standard">
      <style:text-properties fo:font-weight="normal" officeooo:rsid="004dfdfd" officeooo:paragraph-rsid="004dfdfd" fo:background-color="transparent" style:font-weight-asian="normal" style:font-weight-complex="normal"/>
    </style:style>
    <style:style style:name="P94" style:family="paragraph" style:parent-style-name="Standard" style:list-style-name="L4">
      <style:text-properties fo:font-weight="normal" officeooo:rsid="00538be6" officeooo:paragraph-rsid="00538be6" fo:background-color="transparent" style:font-weight-asian="normal" style:font-weight-complex="normal"/>
    </style:style>
    <style:style style:name="P95" style:family="paragraph" style:parent-style-name="Standard">
      <style:text-properties fo:font-weight="normal" officeooo:rsid="00538be6" officeooo:paragraph-rsid="00538be6" fo:background-color="transparent" style:font-weight-asian="normal" style:font-weight-complex="normal"/>
    </style:style>
    <style:style style:name="P96" style:family="paragraph" style:parent-style-name="Standard" style:list-style-name="L5">
      <style:text-properties fo:font-weight="normal" officeooo:rsid="00501214" officeooo:paragraph-rsid="00501214" fo:background-color="transparent" style:font-weight-asian="normal" style:font-weight-complex="normal"/>
    </style:style>
    <style:style style:name="P97" style:family="paragraph" style:parent-style-name="Standard" style:list-style-name="L6">
      <style:text-properties fo:font-weight="normal" officeooo:rsid="003eace7" officeooo:paragraph-rsid="003eace7" style:font-weight-asian="normal" style:font-weight-complex="normal"/>
    </style:style>
    <style:style style:name="P98" style:family="paragraph" style:parent-style-name="Standard" style:list-style-name="L6">
      <style:text-properties fo:font-weight="normal" officeooo:rsid="003eace7" officeooo:paragraph-rsid="005e2ab5" style:font-weight-asian="normal" style:font-weight-complex="normal"/>
    </style:style>
    <style:style style:name="P99" style:family="paragraph" style:parent-style-name="Standard" style:list-style-name="L6">
      <style:text-properties fo:font-weight="normal" officeooo:rsid="0041e0c2" officeooo:paragraph-rsid="0041e0c2" style:font-weight-asian="normal" style:font-weight-complex="normal"/>
    </style:style>
    <style:style style:name="P100" style:family="paragraph" style:parent-style-name="Standard" style:list-style-name="L9">
      <style:text-properties fo:font-weight="normal" officeooo:rsid="00700e93" officeooo:paragraph-rsid="00700e93" fo:background-color="#ffffff" style:font-weight-asian="normal" style:font-weight-complex="normal"/>
    </style:style>
    <style:style style:name="P101" style:family="paragraph" style:parent-style-name="Standard">
      <style:text-properties fo:font-weight="normal" officeooo:rsid="00538be6" officeooo:paragraph-rsid="00558c0a" fo:background-color="#ffffff" style:font-weight-asian="normal" style:font-weight-complex="normal"/>
    </style:style>
    <style:style style:name="P102" style:family="paragraph" style:parent-style-name="Standard" style:list-style-name="L9">
      <style:text-properties fo:font-weight="normal" officeooo:rsid="0072c25a" officeooo:paragraph-rsid="0072c25a" fo:background-color="#ffffff" style:font-weight-asian="normal" style:font-weight-complex="normal"/>
    </style:style>
    <style:style style:name="P103" style:family="paragraph" style:parent-style-name="Standard">
      <style:text-properties fo:font-weight="normal" officeooo:rsid="00740c9b" officeooo:paragraph-rsid="00740c9b" fo:background-color="#ffffff" style:font-weight-asian="normal" style:font-weight-complex="normal"/>
    </style:style>
    <style:style style:name="P104" style:family="paragraph" style:parent-style-name="Standard">
      <style:text-properties fo:font-weight="normal" officeooo:rsid="00614d2c" officeooo:paragraph-rsid="00614d2c" fo:background-color="#ffff00" style:font-weight-asian="normal" style:font-weight-complex="normal"/>
    </style:style>
    <style:style style:name="P105" style:family="paragraph" style:parent-style-name="Standard">
      <style:text-properties fo:font-weight="normal" officeooo:rsid="00700e93" officeooo:paragraph-rsid="00700e93" fo:background-color="#ffffd7" style:font-weight-asian="normal" style:font-weight-complex="normal"/>
    </style:style>
    <style:style style:name="P106" style:family="paragraph" style:parent-style-name="Standard">
      <style:text-properties fo:font-weight="normal" officeooo:rsid="00538be6" officeooo:paragraph-rsid="00558c0a" fo:background-color="#ffffd7" style:font-weight-asian="normal" style:font-weight-complex="normal"/>
    </style:style>
    <style:style style:name="P107" style:family="paragraph" style:parent-style-name="Standard">
      <style:text-properties fo:font-weight="normal" officeooo:rsid="00538be6" officeooo:paragraph-rsid="00700e93" fo:background-color="#ffffd7" style:font-weight-asian="normal" style:font-weight-complex="normal"/>
    </style:style>
    <style:style style:name="P108" style:family="paragraph" style:parent-style-name="Standard">
      <style:text-properties fo:font-weight="normal" officeooo:rsid="00740c9b" officeooo:paragraph-rsid="00740c9b" fo:background-color="#dee6ef" style:font-weight-asian="normal" style:font-weight-complex="normal"/>
    </style:style>
    <style:style style:name="P109" style:family="paragraph" style:parent-style-name="Standard" style:list-style-name="L5">
      <style:text-properties officeooo:paragraph-rsid="00501214"/>
    </style:style>
    <style:style style:name="P110" style:family="paragraph" style:parent-style-name="Standard" style:list-style-name="L5">
      <style:text-properties officeooo:paragraph-rsid="00501214" fo:background-color="transparent"/>
    </style:style>
    <style:style style:name="P111" style:family="paragraph" style:parent-style-name="Standard" style:list-style-name="L5">
      <style:text-properties officeooo:rsid="00538be6" officeooo:paragraph-rsid="00538be6" fo:background-color="transparent"/>
    </style:style>
    <style:style style:name="P112" style:family="paragraph" style:parent-style-name="Standard" style:list-style-name="L5">
      <style:text-properties style:text-line-through-style="none" style:text-line-through-type="none" style:font-name="Liberation Serif" fo:font-size="12pt" style:text-underline-style="none" fo:font-weight="normal" officeooo:rsid="00501214" officeooo:paragraph-rsid="00501214" style:text-blinking="false" fo:background-color="transparent" style:font-size-asian="12pt" style:font-weight-asian="normal" style:font-size-complex="12pt" style:font-weight-complex="normal" loext:padding="0in" loext:border="none"/>
    </style:style>
    <style:style style:name="P113" style:family="paragraph" style:parent-style-name="Standard" style:list-style-name="L6">
      <style:text-properties officeooo:rsid="003eace7" officeooo:paragraph-rsid="003eace7"/>
    </style:style>
    <style:style style:name="P114" style:family="paragraph" style:parent-style-name="Standard" style:list-style-name="L6">
      <style:text-properties officeooo:rsid="004bda12" officeooo:paragraph-rsid="004bda12"/>
    </style:style>
    <style:style style:name="P115" style:family="paragraph" style:parent-style-name="Standard">
      <style:text-properties fo:font-weight="bold" officeooo:rsid="003dbba5" officeooo:paragraph-rsid="00477f08" style:font-weight-asian="bold" style:font-weight-complex="bold"/>
    </style:style>
    <style:style style:name="P116" style:family="paragraph" style:parent-style-name="Standard">
      <style:text-properties fo:font-weight="bold" officeooo:rsid="003dbba5" officeooo:paragraph-rsid="003dbba5" fo:background-color="#ffffd7" style:font-weight-asian="bold" style:font-weight-complex="bold"/>
    </style:style>
    <style:style style:name="P117" style:family="paragraph" style:parent-style-name="Standard">
      <style:text-properties fo:font-weight="bold" officeooo:rsid="00614d2c" officeooo:paragraph-rsid="00614d2c" fo:background-color="#ffffd7" style:font-weight-asian="bold" style:font-weight-complex="bold"/>
    </style:style>
    <style:style style:name="P118" style:family="paragraph" style:parent-style-name="Standard">
      <style:text-properties fo:font-weight="bold" officeooo:rsid="00538be6" officeooo:paragraph-rsid="00558c0a" fo:background-color="#ffffd7" style:font-weight-asian="bold" style:font-weight-complex="bold"/>
    </style:style>
    <style:style style:name="P119" style:family="paragraph" style:parent-style-name="Standard">
      <style:text-properties fo:font-weight="bold" officeooo:rsid="00700e93" officeooo:paragraph-rsid="00700e93" fo:background-color="#ffffff" style:font-weight-asian="bold" style:font-weight-complex="bold"/>
    </style:style>
    <style:style style:name="P120" style:family="paragraph" style:parent-style-name="Standard">
      <style:text-properties officeooo:paragraph-rsid="0055e3fb"/>
    </style:style>
    <style:style style:name="P121" style:family="paragraph" style:parent-style-name="Standard">
      <style:text-properties officeooo:rsid="0027ae3c" officeooo:paragraph-rsid="0027ae3c"/>
    </style:style>
    <style:style style:name="P122" style:family="paragraph" style:parent-style-name="Standard">
      <style:text-properties officeooo:paragraph-rsid="001f1762"/>
    </style:style>
    <style:style style:name="P123" style:family="paragraph" style:parent-style-name="Standard">
      <style:text-properties officeooo:rsid="002b4a45" officeooo:paragraph-rsid="0027ae3c"/>
    </style:style>
    <style:style style:name="P124" style:family="paragraph" style:parent-style-name="Standard">
      <style:text-properties officeooo:rsid="00614d2c" officeooo:paragraph-rsid="00614d2c"/>
    </style:style>
    <style:style style:name="P125" style:family="paragraph" style:parent-style-name="Standard" style:list-style-name="L7">
      <style:text-properties officeooo:rsid="00614d2c" officeooo:paragraph-rsid="00614d2c"/>
    </style:style>
    <style:style style:name="P126" style:family="paragraph" style:parent-style-name="Standard" style:list-style-name="L7">
      <style:text-properties officeooo:rsid="006323b7" officeooo:paragraph-rsid="006323b7"/>
    </style:style>
    <style:style style:name="P127" style:family="paragraph" style:parent-style-name="Standard">
      <style:text-properties officeooo:rsid="006323b7" officeooo:paragraph-rsid="006323b7"/>
    </style:style>
    <style:style style:name="P128" style:family="paragraph" style:parent-style-name="Standard" style:list-style-name="L8">
      <style:text-properties officeooo:rsid="006323b7" officeooo:paragraph-rsid="006323b7"/>
    </style:style>
    <style:style style:name="P129" style:family="paragraph" style:parent-style-name="Table_20_Contents">
      <style:text-properties officeooo:rsid="003aa9a9" officeooo:paragraph-rsid="0055e3fb"/>
    </style:style>
    <style:style style:name="P130" style:family="paragraph" style:parent-style-name="Table_20_Contents">
      <style:text-properties officeooo:rsid="003aa9a9" officeooo:paragraph-rsid="003ce48c"/>
    </style:style>
    <style:style style:name="P131" style:family="paragraph" style:parent-style-name="Table_20_Contents">
      <style:text-properties officeooo:rsid="003aa9a9" officeooo:paragraph-rsid="003aa9a9"/>
    </style:style>
    <style:style style:name="P132" style:family="paragraph" style:parent-style-name="Table_20_Contents">
      <style:text-properties officeooo:rsid="003aa9a9" officeooo:paragraph-rsid="00700e93"/>
    </style:style>
    <style:style style:name="P133" style:family="paragraph" style:parent-style-name="Table_20_Contents">
      <style:text-properties officeooo:rsid="00413bb4" officeooo:paragraph-rsid="0055e3fb"/>
    </style:style>
    <style:style style:name="P134" style:family="paragraph" style:parent-style-name="Table_20_Contents">
      <style:text-properties officeooo:rsid="00413bb4" officeooo:paragraph-rsid="00413bb4"/>
    </style:style>
    <style:style style:name="P135" style:family="paragraph" style:parent-style-name="Table_20_Contents">
      <style:text-properties officeooo:rsid="00413bb4" officeooo:paragraph-rsid="00700e93"/>
    </style:style>
    <style:style style:name="P136" style:family="paragraph" style:parent-style-name="Table_20_Contents">
      <style:text-properties officeooo:rsid="004dfdfd" officeooo:paragraph-rsid="0055e3fb"/>
    </style:style>
    <style:style style:name="P137" style:family="paragraph" style:parent-style-name="Table_20_Contents">
      <style:text-properties officeooo:rsid="004dfdfd" officeooo:paragraph-rsid="00700e93"/>
    </style:style>
    <style:style style:name="P138" style:family="paragraph" style:parent-style-name="Table_20_Contents">
      <style:text-properties officeooo:rsid="00558c0a" officeooo:paragraph-rsid="0055e3fb"/>
    </style:style>
    <style:style style:name="P139" style:family="paragraph" style:parent-style-name="Table_20_Contents">
      <style:text-properties officeooo:rsid="00558c0a" officeooo:paragraph-rsid="00700e93"/>
    </style:style>
    <style:style style:name="P140" style:family="paragraph" style:parent-style-name="Table_20_Contents">
      <style:text-properties officeooo:rsid="003b4598" officeooo:paragraph-rsid="0055e3fb"/>
    </style:style>
    <style:style style:name="P141" style:family="paragraph" style:parent-style-name="Table_20_Contents">
      <style:text-properties officeooo:rsid="003b4598" officeooo:paragraph-rsid="003ce48c"/>
    </style:style>
    <style:style style:name="P142" style:family="paragraph" style:parent-style-name="Table_20_Contents">
      <style:text-properties officeooo:rsid="003b4598" officeooo:paragraph-rsid="003b4598"/>
    </style:style>
    <style:style style:name="P143" style:family="paragraph" style:parent-style-name="Table_20_Contents">
      <style:text-properties officeooo:rsid="003b4598" officeooo:paragraph-rsid="00700e93"/>
    </style:style>
    <style:style style:name="P144" style:family="paragraph" style:parent-style-name="Table_20_Contents">
      <style:text-properties officeooo:paragraph-rsid="0055e3fb"/>
    </style:style>
    <style:style style:name="P145" style:family="paragraph" style:parent-style-name="Table_20_Contents">
      <style:text-properties officeooo:rsid="0055e3fb" officeooo:paragraph-rsid="0055e3fb"/>
    </style:style>
    <style:style style:name="P146" style:family="paragraph" style:parent-style-name="Table_20_Contents">
      <style:text-properties officeooo:rsid="003cb1c9" officeooo:paragraph-rsid="003ce48c"/>
    </style:style>
    <style:style style:name="P147" style:family="paragraph" style:parent-style-name="Table_20_Contents">
      <style:text-properties officeooo:rsid="003cb1c9" officeooo:paragraph-rsid="003cb1c9"/>
    </style:style>
    <style:style style:name="P148" style:family="paragraph" style:parent-style-name="Table_20_Contents">
      <style:text-properties officeooo:rsid="005857a6" officeooo:paragraph-rsid="005857a6"/>
    </style:style>
    <style:style style:name="P149" style:family="paragraph" style:parent-style-name="Table_20_Contents">
      <style:text-properties officeooo:rsid="0059a68c" officeooo:paragraph-rsid="0059a68c"/>
    </style:style>
    <style:style style:name="P150" style:family="paragraph" style:parent-style-name="Table_20_Contents">
      <style:text-properties officeooo:paragraph-rsid="00700e93"/>
    </style:style>
    <style:style style:name="P151" style:family="paragraph" style:parent-style-name="Table_20_Contents">
      <style:text-properties officeooo:rsid="00700e93" officeooo:paragraph-rsid="00700e93"/>
    </style:style>
    <style:style style:name="T1" style:family="text">
      <style:text-properties fo:color="#000000" loext:opacity="100%" style:font-name="Droid Sans Mono" fo:font-size="10.5pt" fo:font-weight="normal"/>
    </style:style>
    <style:style style:name="T2" style:family="text">
      <style:text-properties fo:color="#000000" loext:opacity="100%" style:font-name="Droid Sans Mono" fo:font-size="10.5pt" fo:font-weight="normal" fo:background-color="#ffffd7" loext:char-shading-value="0"/>
    </style:style>
    <style:style style:name="T3" style:family="text">
      <style:text-properties fo:color="#000000" loext:opacity="100%" style:font-name="Droid Sans Mono" fo:font-size="10.5pt" fo:font-weight="normal" officeooo:rsid="00274ee3" fo:background-color="#ffffd7" loext:char-shading-value="0"/>
    </style:style>
    <style:style style:name="T4" style:family="text">
      <style:text-properties fo:color="#000000" loext:opacity="100%" style:font-name="Droid Sans Mono" fo:font-size="10.5pt" fo:font-weight="normal" officeooo:rsid="003262df" fo:background-color="#ffffd7" loext:char-shading-value="0"/>
    </style:style>
    <style:style style:name="T5" style:family="text">
      <style:text-properties fo:color="#000000" loext:opacity="100%" style:font-name="Droid Sans Mono" fo:font-size="10.5pt" fo:font-weight="normal" officeooo:rsid="0034e1d3" fo:background-color="#ffffd7" loext:char-shading-value="0"/>
    </style:style>
    <style:style style:name="T6" style:family="text">
      <style:text-properties fo:color="#000000" loext:opacity="100%" style:font-name="Droid Sans Mono" fo:font-size="10.5pt" fo:font-weight="normal" officeooo:rsid="003374e5"/>
    </style:style>
    <style:style style:name="T7" style:family="text">
      <style:text-properties fo:color="#000000" loext:opacity="100%" fo:font-weight="normal"/>
    </style:style>
    <style:style style:name="T8" style:family="text">
      <style:text-properties fo:color="#000000" loext:opacity="100%" fo:font-weight="normal" officeooo:rsid="003262df"/>
    </style:style>
    <style:style style:name="T9" style:family="text">
      <style:text-properties fo:color="#000000" loext:opacity="100%" fo:font-weight="normal" officeooo:rsid="003374e5"/>
    </style:style>
    <style:style style:name="T10" style:family="text">
      <style:text-properties fo:color="#000000" loext:opacity="100%" fo:font-weight="normal" officeooo:rsid="003ce48c"/>
    </style:style>
    <style:style style:name="T11" style:family="text">
      <style:text-properties fo:color="#000000" loext:opacity="100%" style:font-name="Liberation Serif" fo:font-size="12pt" style:text-underline-style="solid" style:text-underline-width="auto" style:text-underline-color="font-color" fo:font-weight="normal" style:font-size-asian="12pt" style:font-size-complex="12pt"/>
    </style:style>
    <style:style style:name="T12" style:family="text">
      <style:text-properties fo:color="#000000" loext:opacity="100%" style:font-name="Liberation Serif" fo:font-size="12pt" style:text-underline-style="solid" style:text-underline-width="auto" style:text-underline-color="font-color" fo:font-weight="normal" officeooo:rsid="003262df" style:font-size-asian="12pt" style:font-size-complex="12pt"/>
    </style:style>
    <style:style style:name="T13" style:family="text">
      <style:text-properties fo:color="#000000" loext:opacity="100%" style:font-name="Liberation Serif" fo:font-size="12pt" style:text-underline-style="solid" style:text-underline-width="auto" style:text-underline-color="font-color" fo:font-weight="normal" officeooo:rsid="003ce48c" style:font-size-asian="10.5pt" style:font-size-complex="12pt"/>
    </style:style>
    <style:style style:name="T14" style:family="text">
      <style:text-properties fo:color="#000000" loext:opacity="100%" style:font-name="Liberation Serif" fo:font-size="12pt" fo:font-weight="normal" style:font-size-asian="12pt" style:font-size-complex="12pt"/>
    </style:style>
    <style:style style:name="T15" style:family="text">
      <style:text-properties fo:color="#000000" loext:opacity="100%" style:font-name="Liberation Serif" fo:font-size="12pt" fo:font-weight="normal" officeooo:rsid="003ce48c" style:font-size-asian="10.5pt" style:font-size-complex="12pt"/>
    </style:style>
    <style:style style:name="T16" style:family="text">
      <style:text-properties fo:font-weight="bold" style:font-weight-asian="bold" style:font-weight-complex="bold"/>
    </style:style>
    <style:style style:name="T17" style:family="text">
      <style:text-properties fo:font-weight="bold" officeooo:rsid="002ffbe2" style:font-weight-asian="bold" style:font-weight-complex="bold"/>
    </style:style>
    <style:style style:name="T18" style:family="text">
      <style:text-properties fo:font-weight="bold" officeooo:rsid="0030b85b" style:font-weight-asian="bold" style:font-weight-complex="bold"/>
    </style:style>
    <style:style style:name="T19" style:family="text">
      <style:text-properties fo:font-weight="bold" officeooo:rsid="005e2ab5" style:font-weight-asian="bold" style:font-weight-complex="bold"/>
    </style:style>
    <style:style style:name="T20" style:family="text">
      <style:text-properties style:text-underline-style="none" officeooo:rsid="00274ee3"/>
    </style:style>
    <style:style style:name="T21" style:family="text">
      <style:text-properties style:text-underline-style="none" fo:font-weight="bold" officeooo:rsid="00274ee3" style:font-weight-asian="bold" style:font-weight-complex="bold"/>
    </style:style>
    <style:style style:name="T22" style:family="text">
      <style:text-properties style:text-underline-style="none" fo:font-weight="bold" officeooo:rsid="005e2ab5" style:font-weight-asian="bold" style:font-weight-complex="bold"/>
    </style:style>
    <style:style style:name="T23" style:family="text">
      <style:text-properties style:text-line-through-style="none" style:text-line-through-type="none" style:font-name="Liberation Serif" fo:font-size="12pt" style:text-underline-style="none" fo:font-weight="normal" style:text-blinking="false" style:font-size-asian="12pt" style:font-weight-asian="normal" style:font-size-complex="12pt" style:font-weight-complex="normal" loext:padding="0in" loext:border="none"/>
    </style:style>
    <style:style style:name="T24" style:family="text">
      <style:text-properties officeooo:rsid="002ffbe2"/>
    </style:style>
    <style:style style:name="T25" style:family="text">
      <style:text-properties fo:background-color="#ffffd7" loext:char-shading-value="0"/>
    </style:style>
    <style:style style:name="T26" style:family="text">
      <style:text-properties officeooo:rsid="0049f376" fo:background-color="#ffffd7" loext:char-shading-value="0"/>
    </style:style>
    <style:style style:name="T27" style:family="text">
      <style:text-properties officeooo:rsid="00501214" fo:background-color="#ffffd7" loext:char-shading-value="0"/>
    </style:style>
    <style:style style:name="T28" style:family="text">
      <style:text-properties fo:background-color="#dee6ef" loext:char-shading-value="0"/>
    </style:style>
    <style:style style:name="T29" style:family="text">
      <style:text-properties officeooo:rsid="0030b85b"/>
    </style:style>
    <style:style style:name="T30" style:family="text">
      <style:text-properties style:font-name="Liberation Serif" fo:font-size="12pt" fo:font-weight="normal" officeooo:rsid="00501214" style:font-size-asian="12pt" style:font-weight-asian="normal" style:font-size-complex="12pt" style:font-weight-complex="normal"/>
    </style:style>
    <style:style style:name="T31" style:family="text">
      <style:text-properties officeooo:rsid="003b4598"/>
    </style:style>
    <style:style style:name="T32" style:family="text">
      <style:text-properties officeooo:rsid="003ce48c"/>
    </style:style>
    <style:style style:name="T33" style:family="text">
      <style:text-properties fo:font-weight="normal" style:font-weight-asian="normal" style:font-weight-complex="normal"/>
    </style:style>
    <style:style style:name="T34" style:family="text">
      <style:text-properties fo:font-weight="normal" officeooo:rsid="003eace7" style:font-weight-asian="normal" style:font-weight-complex="normal"/>
    </style:style>
    <style:style style:name="T35" style:family="text">
      <style:text-properties fo:font-weight="normal" officeooo:rsid="00501214" style:font-weight-asian="normal" style:font-weight-complex="normal"/>
    </style:style>
    <style:style style:name="T36" style:family="text">
      <style:text-properties fo:font-weight="normal" officeooo:rsid="0055800b" style:font-weight-asian="normal" style:font-weight-complex="normal"/>
    </style:style>
    <style:style style:name="T37" style:family="text">
      <style:text-properties fo:font-weight="normal" fo:background-color="#ffffd7" loext:char-shading-value="0" style:font-weight-asian="normal" style:font-weight-complex="normal"/>
    </style:style>
    <style:style style:name="T38" style:family="text">
      <style:text-properties fo:font-weight="normal" officeooo:rsid="00501214" fo:background-color="transparent" loext:char-shading-value="0" style:font-weight-asian="normal" style:font-weight-complex="normal"/>
    </style:style>
    <style:style style:name="T39" style:family="text">
      <style:text-properties fo:font-weight="normal" officeooo:rsid="0052381f" fo:background-color="transparent" loext:char-shading-value="0" style:font-weight-asian="normal" style:font-weight-complex="normal"/>
    </style:style>
    <style:style style:name="T40" style:family="text">
      <style:text-properties fo:font-weight="normal" officeooo:rsid="006323b7" fo:background-color="transparent" loext:char-shading-value="0" style:font-weight-asian="normal" style:font-weight-complex="normal"/>
    </style:style>
    <style:style style:name="T41" style:family="text">
      <style:text-properties officeooo:rsid="00558c0a"/>
    </style:style>
    <style:style style:name="T42" style:family="text">
      <style:text-properties officeooo:rsid="0055e3fb"/>
    </style:style>
    <style:style style:name="T43" style:family="text">
      <style:text-properties officeooo:rsid="005857a6"/>
    </style:style>
    <style:style style:name="T44" style:family="text">
      <style:text-properties officeooo:rsid="0059a68c"/>
    </style:style>
    <style:style style:name="T45" style:family="text">
      <style:text-properties officeooo:rsid="005e2ab5"/>
    </style:style>
    <style:style style:name="T46" style:family="text">
      <style:text-properties officeooo:rsid="0027d6f4"/>
    </style:style>
    <style:style style:name="T47" style:family="text">
      <style:text-properties officeooo:rsid="003eace7"/>
    </style:style>
    <style:style style:name="T48" style:family="text">
      <style:text-properties officeooo:rsid="006bdf29"/>
    </style:style>
    <style:style style:name="T49" style:family="text">
      <style:text-properties officeooo:rsid="00700e93"/>
    </style:style>
    <style:style style:name="T50" style:family="text">
      <style:text-properties officeooo:rsid="0072c25a"/>
    </style:style>
    <style:style style:name="T51" style:family="text">
      <style:text-properties officeooo:rsid="007a700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in" fo:text-indent="-0.1209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1.5in" fo:text-indent="-0.1209in" fo:margin-left="1.5in"/>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dels : </text:p>
      <text:p text:style-name="P1">1) CobraMamba-Mamba-gpt-3b-v3</text:p>
      <text:p text:style-name="P1">2) Gemma-4-E2B-it</text:p>
      <text:p text:style-name="P1">3) BioMistral-7B-Dare</text:p>
      <text:p text:style-name="P36">4)Falcon3-Mamba-7B-Instruct</text:p>
      <text:p text:style-name="P122"><text:span text:style-name="T21"/></text:p>
      <text:p text:style-name="P17"><text:span text:style-name="T21">Prompt </text:span><text:span text:style-name="T22">1</text:span><text:span text:style-name="T20"> : </text:span><text:span text:style-name="T2">An AI model achieves 95% accuracy on a medical test, but the disease prevalence is only 1%. Explain why accuracy alone may be misleading and ident</text:span><text:span text:style-name="T3">i</text:span><text:span text:style-name="T2">fy better metrics for evaluating the system.</text:span></text:p>
      <text:p text:style-name="P15"/>
      <text:p text:style-name="P8"><text:span text:style-name="T28">COBRA-MAMBA </text:span>:</text:p>
      <text:p text:style-name="P16"/>
      <text:p text:style-name="P16">Solution Preview</text:p>
      <text:p text:style-name="P16">The accuracy of an AI model can be misleading if the disease prevalence is not known. Accuracy measures how well the model predicts the outcome of a test, but it does not take into account the true prevalence of the disease. For example, if the model is trained on data from a population with a high prevalence of the disease, it may achieve high accuracy, even if the disease is rare in the population as a whole. In this case, the model may be overfitting to the training data and not generalizing well to unseen data.</text:p>
      <text:p text:style-name="P16">To evaluate the performance of an AI model more accurately, it is important to consider other metrics such as precision, recall, and F1 score. These metrics take into account both the accuracy and the prevalence of the disease, allowing for a more comprehensive evaluation of the model's performance. Additionally, it is important to consider the sensitivity and specificity of the model, which measure how well it detects and classifies positive and negative cases, respectively.</text:p>
      <text:p text:style-name="P16">In summary, accuracy alone may be misleading when evaluating an AI model, as it does not take into account the true prevalence of the disease. Other metrics such as precision, recall, and F1 score should be used to evaluate the model's performance and ensure that it is generalizing well to unseen data.</text:p>
      <text:p text:style-name="P16"/>
      <text:p text:style-name="P9">GEMMA -2B:</text:p>
      <text:p text:style-name="P16"/>
      <text:p text:style-name="P16">**Why Accuracy is Misleading:**</text:p>
      <text:p text:style-name="P16"/>
      <text:p text:style-name="P16">With a very low disease prevalence (1%), a model that always predicts "no disease" would achieve 99% accuracy ($99\%$ of the population is healthy). This high accuracy is misleading because it doesn't reflect the model's ability to correctly identify the *actual disease cases*.</text:p>
      <text:p text:style-name="P16"/>
      <text:p text:style-name="P16">**Better Metrics:**</text:p>
      <text:p text:style-name="P16"/>
      <text:p text:style-name="P16">* **Sensitivity (Recall):** Measures the proportion of actual positive cases (diseased) that are correctly identified. (Crucial for not missing sick patients.)</text:p>
      <text:p text:style-name="P16">* **Specificity:** Measures the proportion of actual negative cases (healthy) that are correctly identified.</text:p>
      <text:p text:style-name="P16">* **Precision:** Measures the proportion of positive predictions that are actually correct.</text:p>
      <text:p text:style-name="P16">* **F1-Score:** The harmonic mean of Precision and Sensitivity, providing a balanced measure.</text:p>
      <text:p text:style-name="P16">* **Area Under the ROC Curve (AUC-ROC):** Measures the model's ability to distinguish between positive and negative classes across various thresholds.</text:p>
      <text:p text:style-name="P15"/>
      <text:p text:style-name="P15"/>
      <text:p text:style-name="P8"><text:span text:style-name="T28">BIOMISTRAL</text:span> :</text:p>
      <text:p text:style-name="P37"/>
      <text:p text:style-name="P37"><text:soft-page-break/>Accuracy reflects how well an AI model correctly predicts positive and negative cases. However, it can be misleading when the disease prevalence is low because the proportion of true positives (TP) will also be low. In this case, a high accuracy could result from correctly classifying many false positives (FP) as TP rather than actual positives. Better metrics to evaluate the system include precision, recall, F1-score, and area under the receiver operating characteristic curve (AUC-ROC). Precision measures the proportion of predicted positives that are actually positive cases. Recall measures the proportion of actual positive cases that are correctly identified. F1-score is the harmonic mean of precision and recall, providing a balanced evaluation of both. AUC-ROC represents the probability that the model ranks a randomly chosen positive instance higher than a randomly chosen negative instance. These metrics provide more meaningful insights into the performance of the system by accounting for the imbalance between positive and negative cases.</text:p>
      <text:p text:style-name="P18"/>
      <text:p text:style-name="P18"/>
      <text:p text:style-name="P11">FALCON3-MAMBA:</text:p>
      <text:p text:style-name="P18">Accuracy can indeed provide an overall measure of how often predictions are correct; however it does not account well in imbalanced datasets where one class vastly outnumbers another—like rare diseases compared to healthy individuals or positive cases versus negatives as seen here with our hypothetical scenario:</text:p>
      <text:p text:style-name="P18"/>
      <text:p text:style-name="P18">- True Positives(TP): Correctly identified patients who have Disease X </text:p>
      <text:p text:style-name="P18">= Accurate Positive Predictions </text:p>
      <text:p text:style-name="P18"/>
      <text:p text:style-name="P18">• False NegativesFNPredicted Negative when actually having DiseasXe) Misclassified Patients Who Actually Have The Condition But Were Not Identified As Such By Our Model</text:p>
      <text:p text:style-name="P18"/>
      <text:p text:style-name="P18">*True NegtivestnPredicting correctly that someone doesn't havetDisease xwhen they truly don’thaveit</text:p>
      <text:p text:style-name="P18"/>
      <text:p text:style-name="P18">**FalsePositivenpIdentifying Someone ToHaveTheConditionWhenTheyActuallyDonThaveItMisdiagnosisOrTypeIErrorInMedicalTestingContextsThisCouldLeadToUnnecessaryStressAndFurtherExaminationForPatientsWhoAreHealthyButWereWrongfullyFlaggedAsHavingADisorderWhichIsBothExpensiveTimeConsumingEmotionallyTraumaticandPotentiallyHarmfulDependingOnSeverityOfSymptomsAssociatedWithSuchConditionsIfLeftUntreatedWithoutProperFollowUpCareByHealthcareProvidersSpecialistsWhoseJobIToEnsurePatientSafetyThroughCorrectDiagnosesEffectiveTreatmentsThatImproveQualityLifeExpectancyLongevityWhileReducingCostOverrunsWasteSpendingHealthSystemResourcesNeedlesslyUsedInsteadSavingMoneyBetterUtilizedTowardsOtherMoreUrgentPrior</text:p>
      <text:p text:style-name="P18"/>
      <text:p text:style-name="P18">---LATENCY METRICS---</text:p>
      <table:table table:name="Table1" table:style-name="Table1">
        <table:table-column table:style-name="Table1.A"/>
        <table:table-column table:style-name="Table1.B"/>
        <table:table-column table:style-name="Table1.A"/>
        <table:table-column table:style-name="Table1.B"/>
        <table:table-column table:style-name="Table1.E"/>
        <table:table-row>
          <table:table-cell table:style-name="Table1.A1" office:value-type="string">
            <text:p text:style-name="Table_20_Contents"/>
          </table:table-cell>
          <table:table-cell table:style-name="Table1.A1" office:value-type="string">
            <text:p text:style-name="P55">COBRA MAMBA</text:p>
          </table:table-cell>
          <table:table-cell table:style-name="Table1.A1" office:value-type="string">
            <text:p text:style-name="P55">GEMMA-2B</text:p>
          </table:table-cell>
          <table:table-cell table:style-name="Table1.A1" office:value-type="string">
            <text:p text:style-name="P55">BIOMISTRAL-7B</text:p>
          </table:table-cell>
          <table:table-cell table:style-name="Table1.E1" office:value-type="string">
            <text:p text:style-name="P72">FALCON3-MAMBA</text:p>
          </table:table-cell>
        </table:table-row>
        <table:table-row>
          <table:table-cell table:style-name="Table1.A2" office:value-type="string">
            <text:p text:style-name="P55">TTFT</text:p>
          </table:table-cell>
          <table:table-cell table:style-name="Table1.A2" office:value-type="string">
            <text:p text:style-name="P55">0.00<text:span text:style-name="T44">6</text:span> seconds</text:p>
          </table:table-cell>
          <table:table-cell table:style-name="Table1.A2" office:value-type="string">
            <text:p text:style-name="P55">0.003 seconds</text:p>
          </table:table-cell>
          <table:table-cell table:style-name="Table1.A2" office:value-type="string">
            <text:p text:style-name="P55">0.00<text:span text:style-name="T31">3</text:span> seconds</text:p>
          </table:table-cell>
          <table:table-cell table:style-name="Table1.E2" office:value-type="string">
            <text:p text:style-name="P72">0.01<text:span text:style-name="T44">2</text:span></text:p>
          </table:table-cell>
        </table:table-row>
        <table:table-row>
          <table:table-cell table:style-name="Table1.A2" office:value-type="string">
            <text:p text:style-name="P55">E2E Latency</text:p>
          </table:table-cell>
          <table:table-cell table:style-name="Table1.A2" office:value-type="string">
            <text:p text:style-name="P55">4.<text:span text:style-name="T31">70</text:span><text:span text:style-name="T44">2</text:span> secs</text:p>
          </table:table-cell>
          <table:table-cell table:style-name="Table1.A2" office:value-type="string">
            <text:p text:style-name="P55"><text:span text:style-name="T44">6.099</text:span> secs</text:p>
          </table:table-cell>
          <table:table-cell table:style-name="Table1.A2" office:value-type="string">
            <text:p text:style-name="P55">4.<text:span text:style-name="T31">217</text:span> secs</text:p>
          </table:table-cell>
          <table:table-cell table:style-name="Table1.E2" office:value-type="string">
            <text:p text:style-name="P72">1<text:span text:style-name="T44">6.784</text:span></text:p>
          </table:table-cell>
        </table:table-row>
        <table:table-row>
          <table:table-cell table:style-name="Table1.A2" office:value-type="string">
            <text:p text:style-name="P55">Generation Time</text:p>
          </table:table-cell>
          <table:table-cell table:style-name="Table1.A2" office:value-type="string">
            <text:p text:style-name="P55">4.<text:span text:style-name="T31">698</text:span> secs</text:p>
          </table:table-cell>
          <table:table-cell table:style-name="Table1.A2" office:value-type="string">
            <text:p text:style-name="P55"><text:span text:style-name="T44">6.097</text:span> secs</text:p>
          </table:table-cell>
          <table:table-cell table:style-name="Table1.A2" office:value-type="string">
            <text:p text:style-name="P60">4.214</text:p>
          </table:table-cell>
          <table:table-cell table:style-name="Table1.E2" office:value-type="string">
            <text:p text:style-name="P72">1<text:span text:style-name="T44">6.772</text:span></text:p>
          </table:table-cell>
        </table:table-row>
        <table:table-row>
          <table:table-cell table:style-name="Table1.A2" office:value-type="string">
            <text:p text:style-name="P149">Throughput</text:p>
          </table:table-cell>
          <table:table-cell table:style-name="Table1.A2" office:value-type="string">
            <text:p text:style-name="P149">37.53 tokens/sec</text:p>
          </table:table-cell>
          <table:table-cell table:style-name="Table1.A2" office:value-type="string">
            <text:p text:style-name="P149">31.16 tokens/sec</text:p>
          </table:table-cell>
          <table:table-cell table:style-name="Table1.A2" office:value-type="string">
            <text:p text:style-name="P149">38.81 tokens/sec</text:p>
          </table:table-cell>
          <table:table-cell table:style-name="Table1.E2" office:value-type="string">
            <text:p text:style-name="P149">30.53 tokens/sec</text:p>
          </table:table-cell>
        </table:table-row>
        <table:table-row>
          <table:table-cell table:style-name="Table1.A2" office:value-type="string">
            <text:p text:style-name="P60">Words</text:p>
          </table:table-cell>
          <table:table-cell table:style-name="Table1.A2" office:value-type="string">
            <text:p text:style-name="P149">102</text:p>
          </table:table-cell>
          <table:table-cell table:style-name="Table1.A2" office:value-type="string">
            <text:p text:style-name="P60">1<text:span text:style-name="T44">23</text:span></text:p>
          </table:table-cell>
          <table:table-cell table:style-name="Table1.A2" office:value-type="string">
            <text:p text:style-name="P60">156</text:p>
          </table:table-cell>
          <table:table-cell table:style-name="Table1.E2" office:value-type="string">
            <text:p text:style-name="P149">146</text:p>
          </table:table-cell>
        </table:table-row>
        <table:table-row>
          <table:table-cell table:style-name="Table1.A2" office:value-type="string">
            <text:p text:style-name="P60">Characters</text:p>
          </table:table-cell>
          <table:table-cell table:style-name="Table1.A2" office:value-type="string">
            <text:p text:style-name="P149">673</text:p>
          </table:table-cell>
          <table:table-cell table:style-name="Table1.A2" office:value-type="string">
            <text:p text:style-name="P60">9<text:span text:style-name="T44">12</text:span></text:p>
          </table:table-cell>
          <table:table-cell table:style-name="Table1.A2" office:value-type="string">
            <text:p text:style-name="P60">1058</text:p>
          </table:table-cell>
          <table:table-cell table:style-name="Table1.E2" office:value-type="string">
            <text:p text:style-name="P149">2070</text:p>
          </table:table-cell>
        </table:table-row>
      </table:table>
      <text:p text:style-name="P18"/>
      <text:p text:style-name="P18"/>
      <text:p text:style-name="P123"><text:soft-page-break/></text:p>
      <text:p text:style-name="P19"/>
      <text:p text:style-name="P25"><text:span text:style-name="T18">Prompt </text:span><text:span text:style-name="T19">2</text:span><text:span text:style-name="T18"> </text:span><text:span text:style-name="T29">: </text:span><text:span text:style-name="T2">Three Hospitals A,B,C report cancer detection accuracies of 92% , 87% , and 95% respectively. Hospital A screens high-risk patients only, Hospital B screens general population , Hospital C uses AI -assisted diagnosis. Explain why directly comparing these accuracy numbers is misleading and propose a fair framework to evaluate which hospital has the best diagnostic system. </text:span><text:span text:style-name="T4">Answer in brief .</text:span></text:p>
      <text:p text:style-name="P25"><text:span text:style-name="T2"/></text:p>
      <text:p text:style-name="P24"><text:span text:style-name="T2"/></text:p>
      <text:p text:style-name="P31"><text:span text:style-name="T7">C</text:span><text:span text:style-name="T8">OBRA-MAMBA</text:span><text:span text:style-name="T7">-</text:span></text:p>
      <text:p text:style-name="P26"><text:span text:style-name="T1">The comparison between the three hospitals is misleading because it doesn't take into account that all have different patient populations or screening strategies. It would be more accurate to compare them on their ability to correctly identify cancers in each specific subgroup they are targeting (e.g., patients with a high risk for developing cancer). This way we can determine if one hospital performs better than another at detecting certain types of cancers within its target group(s) rather than just overall performance across all groups.</text:span></text:p>
      <text:p text:style-name="P29"><text:span text:style-name="T1"/></text:p>
      <text:list text:style-name="L3">
        <text:list-item>
          <text:p text:style-name="P78">The above prompt is very complex for a 3B model due to which it is either giving very short and incomplete repsonse or giving vague statements.</text:p>
        </text:list-item>
      </text:list>
      <text:p text:style-name="P29"><text:span text:style-name="T1"/></text:p>
      <text:p text:style-name="P38"><text:span text:style-name="T11">G</text:span><text:span text:style-name="T12">EMMA-2B</text:span><text:span text:style-name="T14"> :</text:span><text:span text:style-name="T1"> </text:span></text:p>
      <text:p text:style-name="P28"><text:span text:style-name="T1"/></text:p>
      <text:p text:style-name="P79">**Why Direct Comparison is Misleading:**</text:p>
      <text:p text:style-name="P28"><text:span text:style-name="T1"/></text:p>
      <text:p text:style-name="P79">The accuracies are not directly comparable because the **patient populations and screening strategies are different**:</text:p>
      <text:p text:style-name="P28"><text:span text:style-name="T1"/></text:p>
      <text:p text:style-name="P79">* **Hospital A:** High-risk patients only (easier to detect cancer, potentially higher baseline accuracy).</text:p>
      <text:p text:style-name="P79">* **Hospital B:** General population (lower prevalence of cancer, potentially lower overall accuracy).</text:p>
      <text:p text:style-name="P79">* **Hospital C:** AI-assisted (system performance depends heavily on the AI model and its specific application).</text:p>
      <text:p text:style-name="P28"><text:span text:style-name="T1"/></text:p>
      <text:p text:style-name="P79">**Fair Evaluation Framework:**</text:p>
      <text:p text:style-name="P28"><text:span text:style-name="T1"/></text:p>
      <text:p text:style-name="P79">A fair evaluation requires considering **context and performance metrics**:</text:p>
      <text:p text:style-name="P28"><text:span text:style-name="T1"/></text:p>
      <text:p text:style-name="P79">1. **Define the Target Population:** Specify *who* is being screened (e.g., high-risk, general population, specific demographic).</text:p>
      <text:p text:style-name="P79">2. **Use Appropriate Metrics:** Compare metrics relevant to the context (e.g., Sensitivity, Specificity, Positive Predictive Value (PPV), Negative Predictive Value (NPV), not just raw accuracy).</text:p>
      <text:p text:style-name="P79">3. **Adjust for Prevalence:** Account for the actual rate of cancer in the screened population.</text:p>
      <text:p text:style-name="P79">4. **Standardized Testing:** Ideally, test all systems on an **independent, standardized validation dataset** representing the target population.</text:p>
      <text:p text:style-name="P79">**Conclusion:** The best system depends entirely on the **clinical context** and the **specific diagnostic goal**.</text:p>
      <text:p text:style-name="P26"><text:span text:style-name="T1"/></text:p>
      <text:p text:style-name="P32"><text:span text:style-name="T7">B</text:span><text:span text:style-name="T9">IOMISTRAL-7B:</text:span></text:p>
      <text:p text:style-name="P80">Directly comparing these accuracy numbers is misleading because different hospitals have screened different populations: Hospital A screens only high-risk patients, while hospitals B and C <text:soft-page-break/>screen the general population. The composition of the patient population can significantly impact the overall diagnostic accuracy. To compare these hospitals fairly, we need to consider their respective screening strategies, as well as other factors such as patient demographics, the quality of screening tests used, and how the results were interpreted. One possible way to make a fair comparison is to use a Bayesian approach that takes into account prior knowledge or beliefs about the prevalence of cancer in the general population and high-risk patients, as well as the sensitivity and specificity of the screening tests used by each hospital. We would also need to know more about how the results from screening tests were interpreted and how they were followed up to determine whether a diagnosis was ultimately made.</text:p>
      <text:p text:style-name="P28"><text:span text:style-name="T6"/></text:p>
      <text:p text:style-name="P28"><text:span text:style-name="T6"/></text:p>
      <text:p text:style-name="P33"><text:span text:style-name="T9">F</text:span><text:span text:style-name="T7">ALCON3-MAMBA-7B :</text:span></text:p>
      <text:p text:style-name="P87">Directly compareing hospitals'accuracys mislead because each one serves different populations with varying risks;HospitalA focuses onhigh riskonly(potentially biasingresults towards higher true positives),hospitalBservesgeneralpopulationwithavarietyofrisks,(possiblylowertruepositivesandhigherfalsenegativescomparedtoHospitaLA)whilehospitalChasadvancedtechnologywhichmayoverfitthetrainingdataorperformpoorinrealworldscenarios.</text:p>
      <text:p text:style-name="P87">(dependingonthebalancebetweenbiasandefficiency).</text:p>
      <text:p text:style-name="P87">Toevaluatefaircomparisons:1Useastratifiedsamplingtocomparethediagnosticperformancewithinanalogousgroups2ConsideradditionalmetricslikeprecisionrecallFscoreorseparationmeasure3IncorporatetestforAImodelsrobustnessagainstdistributiondrift4Evaluatecosteffectivenessincludingbothdirectmedicaloutcomesandexpenditureonresources5Ensurerepresentativevalidationdatathroughblindingrandomization6Comparemodelcalibrationtopredictreliabilityindifferentsubpopulations7Performlongitudinalstudiestoassesssustainabledistributiondiagnosticsensitivity8Includepatientfeedbackonsystemusabillityandsatisfaction9Accountforthirdpartyvalidationsuchassealedclinicaltrials10Documentanypotentialconfoundersormisclassificationmechanisms11Regularmonitoringofthemodelupdatesbasedonevolutioninepidemiologicalfactors12AssuretransparentreportingschemesreflectingthesystemsfullcapabilitiesTheseapproacheswouldprovideacomprehensiveviewofthereliabilitieachsystemofferingcancerdetectionthroughtherangepatientspresentedtheirrespectivehealthcaresettingswithoutbiasesfromsimplylookingatsinglepointstatisticslikethoseinitialreportednumbersAccuracypercentagesaloneareinsufficientfortrueunderstandingThekeyistoanalyzethecontextimpactsofthestatementsthenmakewellinformedjudgmentsaboutwhichtoolbestfitsparticularneedsBasedonafullerangingassessmentwecanmorejustifiablydeterminetowhatdegreeeachfacilitydeliversvaluablecontributionsintothefieldOfoncologiccareHighlightthatthisframeworkshouldbeadaptabletomutatingtechnologymodelsnewresearchfindingsAndchangingdemographiccharacteristicstoensurecontinuousimprovementinthequalityCareDeliveredByEachInstitutionThisquestionRequiresDetailedAnalysisBeyondSimpleStatisticalComparativetoCaptureSubtleVariancesThatCouldSignificantlyInfluenceOverallEffectivnessevaluationItIsImportantTorememberNoSingleMetricCanFullyEncompassComplex</text:p>
      <text:p text:style-name="P26"><text:span text:style-name="T1"/></text:p>
      <text:p text:style-name="P83">---LATENCY METRICS---</text:p>
      <table:table table:name="Table2" table:style-name="Table2">
        <table:table-column table:style-name="Table2.A"/>
        <table:table-column table:style-name="Table2.B"/>
        <table:table-column table:style-name="Table2.A"/>
        <table:table-column table:style-name="Table2.D"/>
        <table:table-column table:style-name="Table2.E"/>
        <table:table-row>
          <table:table-cell table:style-name="Table2.A1" office:value-type="string">
            <text:p text:style-name="P59"/>
          </table:table-cell>
          <table:table-cell table:style-name="Table2.A1" office:value-type="string">
            <text:p text:style-name="P55">COBRA MAMBA</text:p>
          </table:table-cell>
          <table:table-cell table:style-name="Table2.A1" office:value-type="string">
            <text:p text:style-name="P55">GEMMA-2B</text:p>
          </table:table-cell>
          <table:table-cell table:style-name="Table2.A1" office:value-type="string">
            <text:p text:style-name="P55">BIOMISTRAL-7B</text:p>
          </table:table-cell>
          <table:table-cell table:style-name="Table2.E1" office:value-type="string">
            <text:p text:style-name="P68">FALCON3=MAMBA-7b</text:p>
          </table:table-cell>
        </table:table-row>
        <table:table-row>
          <table:table-cell table:style-name="Table2.A2" office:value-type="string">
            <text:p text:style-name="P55">TTFT</text:p>
          </table:table-cell>
          <table:table-cell table:style-name="Table2.A2" office:value-type="string">
            <text:p text:style-name="P64">0.007 secs</text:p>
          </table:table-cell>
          <table:table-cell table:style-name="Table2.A2" office:value-type="string">
            <text:p text:style-name="P60">0.004secs</text:p>
          </table:table-cell>
          <table:table-cell table:style-name="Table2.A2" office:value-type="string">
            <text:p text:style-name="P55">0.00<text:span text:style-name="T31">7</text:span> seconds</text:p>
          </table:table-cell>
          <table:table-cell table:style-name="Table2.E2" office:value-type="string">
            <text:p text:style-name="P68">0.0<text:span text:style-name="T43">12 </text:span>seconds</text:p>
          </table:table-cell>
        </table:table-row>
        <table:table-row>
          <table:table-cell table:style-name="Table2.A2" office:value-type="string">
            <text:p text:style-name="P55">E2E Latency</text:p>
          </table:table-cell>
          <table:table-cell table:style-name="Table2.A2" office:value-type="string">
            <text:p text:style-name="P64">1.658 secs</text:p>
          </table:table-cell>
          <table:table-cell table:style-name="Table2.A2" office:value-type="string">
            <text:p text:style-name="P60">10.872 secs</text:p>
          </table:table-cell>
          <table:table-cell table:style-name="Table2.A2" office:value-type="string">
            <text:p text:style-name="P55">4.758 secs</text:p>
          </table:table-cell>
          <table:table-cell table:style-name="Table2.E2" office:value-type="string">
            <text:p text:style-name="P148">17.020</text:p>
          </table:table-cell>
        </table:table-row>
        <table:table-row table:style-name="Table2.4">
          <table:table-cell table:style-name="Table2.A2" office:value-type="string">
            <text:p text:style-name="P55">Generation Time</text:p>
          </table:table-cell>
          <table:table-cell table:style-name="Table2.A2" office:value-type="string">
            <text:p text:style-name="P64">1.651secs</text:p>
          </table:table-cell>
          <table:table-cell table:style-name="Table2.A2" office:value-type="string">
            <text:p text:style-name="P60">10.868 secs</text:p>
          </table:table-cell>
          <table:table-cell table:style-name="Table2.A2" office:value-type="string">
            <text:p text:style-name="P55">4.751 secs</text:p>
          </table:table-cell>
          <table:table-cell table:style-name="Table2.E2" office:value-type="string">
            <text:p text:style-name="P68">1<text:span text:style-name="T43">7.008</text:span></text:p>
          </table:table-cell>
        </table:table-row>
        <table:table-row table:style-name="Table2.4">
          <table:table-cell table:style-name="Table2.A2" office:value-type="string">
            <text:p text:style-name="P55">throughput</text:p>
          </table:table-cell>
          <table:table-cell table:style-name="Table2.A2" office:value-type="string">
            <text:p text:style-name="P64">34.56 tokens/sec</text:p>
          </table:table-cell>
          <table:table-cell table:style-name="Table2.A2" office:value-type="string">
            <text:p text:style-name="P60">32.76 tokens/sec</text:p>
          </table:table-cell>
          <table:table-cell table:style-name="Table2.A2" office:value-type="string">
            <text:p text:style-name="P55">51.77 tokens/sec</text:p>
          </table:table-cell>
          <table:table-cell table:style-name="Table2.E2" office:value-type="string">
            <text:p text:style-name="P148">30.10 tokens/sec</text:p>
          </table:table-cell>
        </table:table-row>
        <table:table-row table:style-name="Table2.4">
          <table:table-cell table:style-name="Table2.A2" office:value-type="string">
            <text:p text:style-name="P60">Words length</text:p>
          </table:table-cell>
          <table:table-cell table:style-name="Table2.A2" office:value-type="string">
            <text:p text:style-name="P64">84</text:p>
          </table:table-cell>
          <table:table-cell table:style-name="Table2.A2" office:value-type="string">
            <text:p text:style-name="P60">214</text:p>
          </table:table-cell>
          <table:table-cell table:style-name="Table2.A2" office:value-type="string">
            <text:p text:style-name="P60">199</text:p>
          </table:table-cell>
          <table:table-cell table:style-name="Table2.E2" office:value-type="string">
            <text:p text:style-name="P148">23</text:p>
          </table:table-cell>
        </table:table-row>
        <table:table-row table:style-name="Table2.7">
          <table:table-cell table:style-name="Table2.A2" office:value-type="string">
            <text:p text:style-name="P60">Characters</text:p>
          </table:table-cell>
          <table:table-cell table:style-name="Table2.A2" office:value-type="string">
            <text:p text:style-name="P64">546</text:p>
          </table:table-cell>
          <table:table-cell table:style-name="Table2.A2" office:value-type="string">
            <text:p text:style-name="P60">1588</text:p>
          </table:table-cell>
          <table:table-cell table:style-name="Table2.A2" office:value-type="string">
            <text:p text:style-name="P60">1291</text:p>
          </table:table-cell>
          <table:table-cell table:style-name="Table2.E2" office:value-type="string">
            <text:p text:style-name="P148">2295</text:p>
          </table:table-cell>
        </table:table-row>
      </table:table>
      <text:p text:style-name="P27"><text:soft-page-break/><text:span text:style-name="T1"/></text:p>
      <text:p text:style-name="P20"/>
      <text:p text:style-name="P19"/>
      <text:p text:style-name="P22"><text:span text:style-name="T17">Prompt </text:span><text:span text:style-name="T19">3</text:span><text:span text:style-name="T17"> </text:span><text:span text:style-name="T24">: </text:span><text:span text:style-name="T2">An AI diagnostic system trained on data from urban hospitals is being deployed in rural clinics where patient demographics, disease pattern and available equipment are significantly different. What are the ethical , technical and clinical risks of deployment ? How should such a system be validated before deployment in a new population </text:span><text:span text:style-name="T5">Answer in brief.</text:span></text:p>
      <text:p text:style-name="P23"><text:span text:style-name="T2"/></text:p>
      <text:p text:style-name="P38"><text:span text:style-name="T13">COBRA MAMBA-3B</text:span><text:span text:style-name="T1">:</text:span></text:p>
      <text:p text:style-name="P28"><text:span text:style-name="T1">The ethical risks of deploying an AI diagnostic system include possible discrimination against certain populations due to lack of access or ability to pay for healthcare services; potential for misuse by malicious actors who could exploit vulnerable people; and the risk that the AI may not provide accurate results if it has been trained with insufficient data or incorrectly interpreted the information received. Technical risks involve issues related to data privacy, data security, and data quality control as well as the need for robust testing and validation procedures prior to deployment. Clinical risks include uncertainty about whether AI-based diagnoses will improve outcomes over traditional methods and whether they can accurately detect rare diseases. Additionally, there is concern regarding potential bias in algorithmic decisions made based on AI predictions rather than human judgment.</text:span></text:p>
      <text:p text:style-name="P26"><text:span text:style-name="T1"/></text:p>
      <text:p text:style-name="P34"><text:span text:style-name="T10">GEMMA-2B</text:span><text:span text:style-name="T7">:</text:span></text:p>
      <text:p text:style-name="P81">Here is a brief overview of the ethical, technical, and clinical risks, and validation strategies for deploying an urban-trained AI diagnostic system in a rural setting.</text:p>
      <text:p text:style-name="P26"><text:span text:style-name="T1"/></text:p>
      <text:p text:style-name="P81">---</text:p>
      <text:p text:style-name="P26"><text:span text:style-name="T1"/></text:p>
      <text:p text:style-name="P81">## Risks of Deployment</text:p>
      <text:p text:style-name="P26"><text:span text:style-name="T1"/></text:p>
      <text:p text:style-name="P81">### 1. Ethical Risks</text:p>
      <text:p text:style-name="P81">* **Bias and Inequity:** The model may perform poorly or misdiagnose patients from the rural demographic (different genetics, lifestyle, co-morbidities) due to training data bias, leading to health disparities.</text:p>
      <text:p text:style-name="P81">* **Lack of Informed Consent:** Patients in rural settings may not fully understand how the AI is making recommendations or the limitations of the technology.</text:p>
      <text:p text:style-name="P81">* **Accountability Gap:** Determining who is responsible when the AI makes an error (the developer, the clinic, or the clinician) is unclear.</text:p>
      <text:p text:style-name="P26"><text:span text:style-name="T1"/></text:p>
      <text:p text:style-name="P81">### 2. Technical Risks</text:p>
      <text:p text:style-name="P81">* **Data Drift/Domain Shift:** The fundamental differences in patient populations, imaging equipment, and disease prevalence (domain shift) will cause the model's accuracy to degrade significantly.</text:p>
      <text:p text:style-name="P81">* **Infrastructure Failure:** Rural clinics may have unreliable internet, power, or outdated hardware, leading to system downtime.</text:p>
      <text:p text:style-name="P81">* **Model Robustness:** The system may fail to generalize to novel presentations of diseases common in the rural population.</text:p>
      <text:p text:style-name="P26"><text:span text:style-name="T1"/></text:p>
      <text:p text:style-name="P81">### 3. Clinical Risks</text:p>
      <text:p text:style-name="P81">* **Misdiagnosis/Delayed Diagnosis:** The most severe risk is providing inaccurate diagnoses or missing critical conditions because the model is operating outside its validated parameters.</text:p>
      <text:p text:style-name="P81"><text:soft-page-break/>* **Over-reliance (Automation Bias):** Clinicians might blindly trust the AI output, overriding their own clinical judgment, especially if the AI output is unfamiliar or contradictory to local knowledge.</text:p>
      <text:p text:style-name="P81">* **Inappropriate Treatment Recommendations:** Recommendations based on urban protocols or data that are not applicable to the rural patient's resources or context.</text:p>
      <text:p text:style-name="P26"><text:span text:style-name="T1"/></text:p>
      <text:p text:style-name="P81">## Validation Strategy Before Deployment</text:p>
      <text:p text:style-name="P81">Validation must focus heavily on **local relevance** and **robustness testing**.</text:p>
      <text:p text:style-name="P26"><text:span text:style-name="T1"/></text:p>
      <text:p text:style-name="P81">1. **Prospective, Localized Validation (The Crucial Step):**</text:p>
      <text:p text:style-name="P81"><text:s text:c="4"/>* **Pilot Study:** Deploy the system in a controlled, small-scale pilot within the target rural clinics.</text:p>
      <text:p text:style-name="P81"><text:s text:c="4"/>* **Ground Truth Collection:** Collect new, locally sourced patient data to establish a true baseline performance metric specific to the rural population.</text:p>
      <text:p text:style-name="P81"><text:s text:c="4"/>* **Shadow Mode Testing:** Run the AI in parallel with human diagnosis without its results influencing patient care, allowing comparison of AI output vs. clinician output in real-time.</text:p>
      <text:p text:style-name="P26"><text:span text:style-name="T1"/></text:p>
      <text:p text:style-name="P26"><text:span text:style-name="T1">2. **Domain Adaptation &amp; Fine-Tuning:**</text:span></text:p>
      <text:p text:style-name="P81"><text:s text:c="4"/>* **Transfer Learning/Fine-Tuning:** Use the existing urban model as a starting point, but aggressively fine-tune it using the limited, relevant local data to adapt its features to the new domain.</text:p>
      <text:p text:style-name="P26"><text:span text:style-name="T1"/></text:p>
      <text:p text:style-name="P81">3. **Usability and Workflow Assessment:**</text:p>
      <text:p text:style-name="P81"><text:s text:c="4"/>* **Clinician Feedback:** Assess how easily the system integrates into the existing, often resource-constrained, workflow. Ensure the interface is intuitive and does not add undue burden.</text:p>
      <text:p text:style-name="P26"><text:span text:style-name="T1"/></text:p>
      <text:p text:style-name="P81">4. **Performance Benchmarking:**</text:p>
      <text:p text:style-name="P81"><text:s text:c="4"/>* **Define Acceptable Thresholds:** Establish clear, clinically acceptable performance metrics (sensitivity, specificity) *for the rural population* before deployment, rather than relying solely on the urban benchmark.</text:p>
      <text:p text:style-name="P81">Response length: 438words | 3173characters</text:p>
      <text:p text:style-name="P26"><text:span text:style-name="T1"/></text:p>
      <text:p text:style-name="P26"><text:span text:style-name="T1"/></text:p>
      <text:p text:style-name="P10"><text:span text:style-name="T15">BIOMISTRAL </text:span><text:span text:style-name="T1">:</text:span></text:p>
      <text:p text:style-name="P79">Deploying an AI diagnostic system trained on data from urban hospitals to rural clinics can introduce several ethical, technical, and clinical risks. Here are some key considerations:</text:p>
      <text:p text:style-name="P28"><text:span text:style-name="T1"/></text:p>
      <text:p text:style-name="P79">Ethical Risks:</text:p>
      <text:p text:style-name="P79">1. Bias: The AI system could perpetuate existing biases against certain groups (e.g., low-income, elderly, or racial/ethnic minorities) if not designed and tested carefully. This could lead to misdiagnosis, underdiagnosis, or unequal access to care.</text:p>
      <text:p text:style-name="P79">2. Privacy: Rural clinics may not have adequate security measures in place to protect patient privacy when transferring data to remote servers for analysis by the AI system. There may also be concerns about who has access to this data and how it is used.</text:p>
      <text:p text:style-name="P79">3. Transparency: Patients and healthcare providers in rural areas may not fully understand how the AI system works or how it makes decisions. This lack of transparency could lead to mistrust of the system and potentially harmful decisions based on incorrect diagnoses.</text:p>
      <text:p text:style-name="P79">4. Accountability: It may be difficult to determine who is responsible if the AI system makes a wrong diagnosis or recommendation, especially if the system is connected across multiple institutions and vendors.</text:p>
      <text:p text:style-name="P28"><text:soft-page-break/><text:span text:style-name="T1"/></text:p>
      <text:p text:style-name="P79">Technical Risks:</text:p>
      <text:p text:style-name="P28"><text:span text:style-name="T1"/></text:p>
      <text:p text:style-name="P79">1. Equipment Limitations: Rural clinics may not have the same level of technology as urban hospitals, which could limit the types of tests that can be performed and the quality of data that can be collected. This could reduce the accuracy of the AI system's predictions.</text:p>
      <text:p text:style-name="P79">2. Connectivity Issues: Rural areas may have limited internet connectivity, which could impact the ability to transmit data to the central server or receive real-time diagnoses from the AI system. This could result in delays or errors in treatment.</text:p>
      <text:p text:style-name="P79">3. Power Failures: Rural clinics may experience frequent power outages, which could disrupt the operation of the AI system and prevent it from making accurate diagnoses.</text:p>
      <text:p text:style-name="P79">4. Cybersecurity Threats: Rural clinics may be more vulnerable to cyber attacks due to their smaller size and fewer resources for security. This could compromise the integrity of the AI system and put patient data at risk.</text:p>
      <text:p text:style-name="P28"><text:span text:style-name="T1"/></text:p>
      <text:p text:style-name="P79">Clinical Risks:</text:p>
      <text:p text:style-name="P28"><text:span text:style-name="T1"/></text:p>
      <text:p text:style-name="P28"><text:span text:style-name="T1">1. Accuracy: The AI system may not perform well in a new population with different disease patterns and demographic characteristics. This could lead to incorrect diagnoses and suboptimal treatment plans.</text:span></text:p>
      <text:p text:style-name="P79">2. Overreliance: Healthcare providers in rural areas may become overly reliant on the AI system, leading to less critical thinking and decision-making skills. This could result in missed diagnoses or unnecessary treatments.</text:p>
      <text:p text:style-name="P79">3. Misuse: Healthcare providers in rural areas may use the AI system for purposes other than its intended function (e.g., to make insurance decisions or discriminate against certain patients). This could violate ethical standards and lead to legal consequences.</text:p>
      <text:p text:style-name="P28"><text:span text:style-name="T1"/></text:p>
      <text:p text:style-name="P28"><text:span text:style-name="T1"/></text:p>
      <text:p text:style-name="P86">FALCON3-MAMBA-7B: </text:p>
      <text:p text:style-name="P82">Ethical Risks: </text:p>
      <text:p text:style-name="P82">- Bias or Discrimination Risk due to Urban Data Training Base; The model might not perform well for patients with unique characteristics found only among those living rurally if it has been primarily fed information about an entirely distinct demographic group during its training phase which could lead into misdiagnosis leading potentially life threatening situations especially when dealing critical conditions like heart attacks etc.</text:p>
      <text:p text:style-name="P82">, This can result unfair treatment based upon geographical location rather than actual health condition thereby violating principles related non discrimination embedded within healthcare ethics guidelines globally including World Health Organization's Constitution Article H(1).</text:p>
      <text:p text:style-name="P30"><text:span text:style-name="T1"/></text:p>
      <text:p text:style-name="P82"><text:s/>Technical Challenges/Risks </text:p>
      <text:p text:style-name="P30"><text:span text:style-name="T1"/></text:p>
      <text:p text:style-name="P82">• Overfitting Due To Limited Diversity In Dataset Used For Model Development <text:s/>– If most part Of dataset used while developing algorithm comes predominantly form single source i e city dwellers then chances high that developed solution won’t generalize very good across diverse scenarios encountered outside original context causing poor performance once exposed real world complexities associated Rural Healthcare Settings.</text:p>
      <text:p text:style-name="P82"><text:s/></text:p>
      <text:p text:style-name="P82">Clinical Concerns </text:p>
      <text:p text:style-name="P82"><text:s/></text:p>
      <text:p text:style-name="P82"><text:soft-page-break/>Misinterpretation Or Mismanagement Resulting From Lack Familiarity With Local Contextual Factors Affect Patient Care Delivery Such As Cultural Belief Systems Around Illness Perception And Treatment Adherence Which Might Not Be Captured By An Algorithm Trained Solely On Information Derived City Based Populations Leading Suboptimal Outcomes Amongst Patients Living Rurals Areas.</text:p>
      <text:p text:style-name="P30"><text:span text:style-name="T1"/></text:p>
      <text:p text:style-name="P82">Validation Process Before Deployment </text:p>
      <text:p text:style-name="P82"><text:s text:c="2"/></text:p>
      <text:p text:style-name="P82"><text:s/>Conduct Comprehensive Analysis Comparable Demographic Characteristics Between Source Population Original Train Set Vs Target Group Intended Deploy System Identify Key Differences That May Impact Accuracy</text:p>
      <text:p text:style-name="P22"><text:span text:style-name="T2"/></text:p>
      <text:p text:style-name="P22"><text:span text:style-name="T2"/></text:p>
      <text:p text:style-name="P22"><text:span text:style-name="T2"/></text:p>
      <text:p text:style-name="P22"><text:span text:style-name="T2"/></text:p>
      <text:p text:style-name="P50"><text:span text:style-name="T2"/></text:p>
      <text:p text:style-name="P84">LATENCY METRICES:</text:p>
      <text:p text:style-name="P50"><text:span text:style-name="T2"/></text:p>
      <text:p text:style-name="P22"><text:span text:style-name="T2"/></text:p>
      <table:table table:name="Table3" table:style-name="Table3">
        <table:table-column table:style-name="Table3.A"/>
        <table:table-column table:style-name="Table3.B"/>
        <table:table-column table:style-name="Table3.A"/>
        <table:table-column table:style-name="Table3.B"/>
        <table:table-column table:style-name="Table3.E"/>
        <table:table-row>
          <table:table-cell table:style-name="Table3.A1" office:value-type="string">
            <text:p text:style-name="P66"/>
          </table:table-cell>
          <table:table-cell table:style-name="Table3.A1" office:value-type="string">
            <text:p text:style-name="P56">COBRA MAMBA</text:p>
          </table:table-cell>
          <table:table-cell table:style-name="Table3.A1" office:value-type="string">
            <text:p text:style-name="P56">GEMMA-2B</text:p>
          </table:table-cell>
          <table:table-cell table:style-name="Table3.A1" office:value-type="string">
            <text:p text:style-name="P56">BIOMISTRAL-7B</text:p>
          </table:table-cell>
          <table:table-cell table:style-name="Table3.E1" office:value-type="string">
            <text:p text:style-name="P69">FALCON3-MAMBA-7B</text:p>
          </table:table-cell>
        </table:table-row>
        <table:table-row>
          <table:table-cell table:style-name="Table3.A2" office:value-type="string">
            <text:p text:style-name="P56">TTFT</text:p>
          </table:table-cell>
          <table:table-cell table:style-name="Table3.A2" office:value-type="string">
            <text:p text:style-name="P65">0.00<text:span text:style-name="T32">8</text:span> secs</text:p>
          </table:table-cell>
          <table:table-cell table:style-name="Table3.A2" office:value-type="string">
            <text:p text:style-name="P61">0.004secs</text:p>
          </table:table-cell>
          <table:table-cell table:style-name="Table3.A2" office:value-type="string">
            <text:p text:style-name="P56">0.00<text:span text:style-name="T32">5</text:span>seconds</text:p>
          </table:table-cell>
          <table:table-cell table:style-name="Table3.E2" office:value-type="string">
            <text:p text:style-name="P69">0.012 secs</text:p>
          </table:table-cell>
        </table:table-row>
        <table:table-row>
          <table:table-cell table:style-name="Table3.A2" office:value-type="string">
            <text:p text:style-name="P56">E2E Latency</text:p>
          </table:table-cell>
          <table:table-cell table:style-name="Table3.A2" office:value-type="string">
            <text:p text:style-name="P65"><text:span text:style-name="T32">3.959</text:span> secs</text:p>
          </table:table-cell>
          <table:table-cell table:style-name="Table3.A2" office:value-type="string">
            <text:p text:style-name="P61"><text:span text:style-name="T32">1</text:span>7.637</text:p>
          </table:table-cell>
          <table:table-cell table:style-name="Table3.A2" office:value-type="string">
            <text:p text:style-name="P56">8.384</text:p>
          </table:table-cell>
          <table:table-cell table:style-name="Table3.E2" office:value-type="string">
            <text:p text:style-name="P69">17.735</text:p>
          </table:table-cell>
        </table:table-row>
        <table:table-row table:style-name="Table3.4">
          <table:table-cell table:style-name="Table3.A2" office:value-type="string">
            <text:p text:style-name="P56">Generation Time</text:p>
          </table:table-cell>
          <table:table-cell table:style-name="Table3.A2" office:value-type="string">
            <text:p text:style-name="P65"><text:span text:style-name="T32">3.951</text:span>secs</text:p>
          </table:table-cell>
          <table:table-cell table:style-name="Table3.A2" office:value-type="string">
            <text:p text:style-name="P61"><text:span text:style-name="T32">1</text:span>7.633</text:p>
          </table:table-cell>
          <table:table-cell table:style-name="Table3.A2" office:value-type="string">
            <text:p text:style-name="P56">8.379 secs</text:p>
          </table:table-cell>
          <table:table-cell table:style-name="Table3.E2" office:value-type="string">
            <text:p text:style-name="P69">17.722</text:p>
          </table:table-cell>
        </table:table-row>
        <table:table-row table:style-name="Table3.4">
          <table:table-cell table:style-name="Table3.A2" office:value-type="string">
            <text:p text:style-name="P56">Throughput</text:p>
          </table:table-cell>
          <table:table-cell table:style-name="Table3.A2" office:value-type="string">
            <text:p text:style-name="P65">47.15 tokens/sec</text:p>
          </table:table-cell>
          <table:table-cell table:style-name="Table3.A2" office:value-type="string">
            <text:p text:style-name="P61">35.79 tokens/sec</text:p>
          </table:table-cell>
          <table:table-cell table:style-name="Table3.A2" office:value-type="string">
            <text:p text:style-name="P56">74.71 tokens/sec</text:p>
          </table:table-cell>
          <table:table-cell table:style-name="Table3.E2" office:value-type="string">
            <text:p text:style-name="P69">28.89 tokens/sec</text:p>
          </table:table-cell>
        </table:table-row>
        <table:table-row table:style-name="Table3.4">
          <table:table-cell table:style-name="Table3.A2" office:value-type="string">
            <text:p text:style-name="P61">Words length</text:p>
          </table:table-cell>
          <table:table-cell table:style-name="Table3.A2" office:value-type="string">
            <text:p text:style-name="P67">106</text:p>
          </table:table-cell>
          <table:table-cell table:style-name="Table3.A2" office:value-type="string">
            <text:p text:style-name="P67">430</text:p>
          </table:table-cell>
          <table:table-cell table:style-name="Table3.A2" office:value-type="string">
            <text:p text:style-name="P67">474</text:p>
          </table:table-cell>
          <table:table-cell table:style-name="Table3.E2" office:value-type="string">
            <text:p text:style-name="P69">299</text:p>
          </table:table-cell>
        </table:table-row>
        <table:table-row table:style-name="Table3.4">
          <table:table-cell table:style-name="Table3.A2" office:value-type="string">
            <text:p text:style-name="P61">Characters</text:p>
          </table:table-cell>
          <table:table-cell table:style-name="Table3.A2" office:value-type="string">
            <text:p text:style-name="P67">693</text:p>
          </table:table-cell>
          <table:table-cell table:style-name="Table3.A2" office:value-type="string">
            <text:p text:style-name="P67">3227</text:p>
          </table:table-cell>
          <table:table-cell table:style-name="Table3.A2" office:value-type="string">
            <text:p text:style-name="P67">3082</text:p>
          </table:table-cell>
          <table:table-cell table:style-name="Table3.E2" office:value-type="string">
            <text:p text:style-name="P69">4452</text:p>
          </table:table-cell>
        </table:table-row>
      </table:table>
      <text:p text:style-name="P21"/>
      <text:p text:style-name="P25"><text:span text:style-name="T2">(Falcon mamba response : after the theoretical response was over it left a lot of random empty space and gave random character like \\== at end.)</text:span></text:p>
      <text:p text:style-name="P24"/>
      <text:p text:style-name="P39"/>
      <text:p text:style-name="P3"><text:span text:style-name="T16">Prompt </text:span><text:span text:style-name="T19">4</text:span>: <text:span text:style-name="T25">A student consistently performs well in practice tests but fails in actual exams . What are the possible psychological and neurological reasons behind this ? What stratergies can help bridge the gap between practice performance and actual performance ? </text:span></text:p>
      <text:p text:style-name="P3"><text:span text:style-name="T26"/></text:p>
      <text:p text:style-name="P5"><text:span text:style-name="T25">(Without the brief keyword)</text:span></text:p>
      <text:p text:style-name="P39"/>
      <text:p text:style-name="P14">COBRA-MAMBA :</text:p>
      <text:p text:style-name="P3">There are many potential explanations for why a student may perform poorly on an exam compared to their performance during practice. Here are some of them :</text:p>
      <text:p text:style-name="P3">1- Poor time management skills - Many students do not have good time management skills, which often leads to poor concentration levels when it comes to studying or taking exams. This can lead to forgetting key concepts or being overwhelmed by information overload , resulting in lower test scores.</text:p>
      <text:p text:style-name="P3">2- Lack of motivation - Some students lack the motivation to study or prepare for exams because they feel confident about their ability to perform well without putting in extra effort. However, this is often not true as there will always be room for improvement even if you're already doing well.</text:p>
      <text:p text:style-name="P3"><text:soft-page-break/>3- Inability to take criticism - Another reason could be that students don’t take feedback from their teachers or peers very well. They may not be able to understand what went wrong with their exam performance and how to improve upon it.</text:p>
      <text:p text:style-name="P3">4- Not understanding the exam format - Students may be unfamiliar with the specific format of the exam they’ll be taking, leading to confusion and difficulty concentrating on the material. It would be helpful to familiarize yourself with the type of questions asked so you know what to expect.</text:p>
      <text:p text:style-name="P3">5- Bad study habits - Many students have bad study habits such as skipping class, not reading assigned textbooks, or not completing homework assignments on time. These habits can lead to a decrease in overall academic performance, including in exams.</text:p>
      <text:p text:style-name="P3">6- Stress - Exams can cause a lot of stress for students. If you’re already feeling stressed, it can be hard to focus on learning new material and remembering important details.</text:p>
      <text:p text:style-name="P3">7- Lack of confidence - There are times when students lack self-confidence, which can impact their ability to perform well in exams. You may be afraid of making mistakes, or you may not believe that you can succeed in the exam despite your previous success in practice tests.</text:p>
      <text:p text:style-name="P3">8- Depression or anxiety - Mental health issues such as depression or anxiety can also affect one’s ability to perform well on exams. If you’re experiencing symptoms of depression or anxiety, it’s important to seek professional assistance.</text:p>
      <text:p text:style-name="P3">9- Genetic factors - Certain genetic factors may play a role in a person’s cognitive abilities and exam performance. If your family members have had low exam scores, it may be worth considering whether there’s any genetic component at play here.</text:p>
      <text:p text:style-name="P3">Overall, while these are all possible explanations for why</text:p>
      <text:p text:style-name="P3"/>
      <text:p text:style-name="P3"/>
      <text:p text:style-name="P13">GEMMA4-E2B:</text:p>
      <text:p text:style-name="P4">This is a very common and frustrating experience for students. The discrepancy between strong practice test scores and poor actual exam performance points to a gap in **test-taking skills, performance anxiety management, and the difference between simulated and real-world testing conditions.**</text:p>
      <text:p text:style-name="P4"/>
      <text:p text:style-name="P4">Here is a detailed breakdown of the possible psychological and neurological reasons, followed by actionable strategies to bridge the gap.</text:p>
      <text:p text:style-name="P4"/>
      <text:p text:style-name="P4">## Part 1: Possible Psychological and Neurological Reasons</text:p>
      <text:p text:style-name="P4"/>
      <text:p text:style-name="P4">The issue is rarely a lack of knowledge; it's usually a failure in the *application* of that knowledge under pressure.</text:p>
      <text:p text:style-name="P4"/>
      <text:p text:style-name="P4">### A. Psychological Factors (Mindset and Emotion)</text:p>
      <text:p text:style-name="P4"/>
      <text:p text:style-name="P4">1. **Test Anxiety (Performance Anxiety):** This is the most common culprit.</text:p>
      <text:p text:style-name="P4"><text:s text:c="4"/>* **Mechanism:** High anxiety triggers the "fight or flight" response. This floods the brain with stress hormones (like cortisol), which impairs the function of the **prefrontal cortex (PFC)**—the area responsible for complex reasoning, planning, and working memory.</text:p>
      <text:p text:style-name="P4"><text:s text:c="4"/>* **Impact:** During the actual exam, anxiety can lead to **cognitive overload**, freezing up, forgetting known information, or making careless errors.</text:p>
      <text:p text:style-name="P4">2. **Over-Reliance on Familiarity (The "Practice Effect"):**</text:p>
      <text:p text:style-name="P4"><text:s text:c="4"/>* **Mechanism:** Practice tests are familiar. The student knows the format, the pacing, and the types of questions. This familiarity creates a false sense of confidence.</text:p>
      <text:p text:style-name="P4"><text:s text:c="4"/>* **Impact:** When the actual exam deviates slightly (e.g., a tricky wording, a different question structure, or unexpected time pressure), the student lacks the flexible cognitive strategy to adapt, leading to a breakdown.</text:p>
      <text:p text:style-name="P4">3. **Perfectionism and Fear of Failure:**</text:p>
      <text:p text:style-name="P4"><text:soft-page-break/><text:s text:c="4"/>* **Mechanism:** If the student has a high internal standard, they might become paralyzed by the fear that they *will* fail the real exam, leading to hesitation or rushing.</text:p>
      <text:p text:style-name="P4"><text:s text:c="4"/>* **Impact:** This hesitation wastes valuable time, and rushing leads to careless mistakes, which are often the difference between a good practice score and a poor actual score.</text:p>
      <text:p text:style-name="P4">4. **Poor Self-Regulation/Executive Function Deficits:**</text:p>
      <text:p text:style-name="P4"><text:s text:c="4"/>* **Mechanism:** This involves the ability to manage one's own behavior, attention, and impulses.</text:p>
      <text:p text:style-name="P4"><text:s text:c="4"/>* **Impact:** Difficulty in **time management** (spending too long on one question), **distraction management** (getting sidetracked), or **strategic allocation** of time across different question types.</text:p>
      <text:p text:style-name="P4"/>
      <text:p text:style-name="P4">### B. Neurological/Cognitive Factors (How the Brain Processes Information)</text:p>
      <text:p text:style-name="P4"/>
      <text:p text:style-name="P4">1. **Lack of Transferability of Skills:**</text:p>
      <text:p text:style-name="P4"><text:s text:c="4"/>* **Mechanism:** Practice tests train the brain to solve *that specific type* of problem in *that specific environment*. Actual exams often require **transfer learning**—applying concepts to novel, complex, or multi-step problems that weren't explicitly modeled in practice.</text:p>
      <text:p text:style-name="P4"><text:s text:c="4"/>* **Impact:** The student knows the steps for Problem A, but cannot flexibly assemble those steps to solve Problem Z.</text:p>
      <text:p text:style-name="P4">2. **Working Memory Overload Under Pressure:**</text:p>
      <text:p text:style-name="P4"><text:s text:c="4"/>* **Mechanism:** During a high-stakes exam, the working memory (the mental scratchpad where you hold information temporarily) becomes saturated by the stress and the pressure to recall complex formulas or long passages.</text:p>
      <text:p text:style-name="P4"><text:s text:c="4"/>* **Impact:** Information stored in long-term memory is inaccessible because the cognitive resources are tied up managing anxiety and monitoring the test environment.</text:p>
      <text:p text:style-name="P4">3. **Impaired Retrieval Practice Under Stress:**</text:p>
      <text:p text:style-name="P4"><text:s text:c="4"/>* **Mechanism:** Effective learning involves *retrieval practice* (forcing the brain to pull information out). Anxiety can interfere with this process.</text:p>
      <text:p text:style-name="P4"><text:s text:c="4"/>* **Impact:** The student might *know* the answer but cannot retrieve it quickly when the pressure is on, leading to blanking.</text:p>
      <text:p text:style-name="P4"/>
      <text:p text:style-name="P4">---</text:p>
      <text:p text:style-name="P4"/>
      <text:p text:style-name="P4">## Part 2: Strategies to Bridge the Gap</text:p>
      <text:p text:style-name="P4"/>
      <text:p text:style-name="P4">The solution lies in shifting the focus from **"Knowing the material"** (which practice tests confirm) to **"Performing under pressure"** (which actual exams test).</text:p>
      <text:p text:style-name="P4"/>
      <text:p text:style-name="P4">### 1. De-Sensitize the Testing Environment (Managing Anxiety)</text:p>
      <text:p text:style-name="P4"/>
      <text:p text:style-name="P4">* **Simulate the Real Conditions:** Practice tests are good, but they aren't *real*.</text:p>
      <text:p text:style-name="P4"><text:s text:c="4"/>* **Strategy:** Take full-length practice tests in the exact conditions of the actual exam (same time of day, same room setup, no distractions, strict time limits).</text:p>
      <text:p text:style-name="P4">* **Mindfulness and Breathing Techniques:**</text:p>
      <text:p text:style-name="P4"><text:s text:c="4"/>* **Strategy:** Before the exam starts, practice 2-3 minutes of deep, diaphragmatic breathing. This physically signals the nervous system to calm down, activating the parasympathetic (rest and digest) system instead of the sympathetic (fight or flight) system.</text:p>
      <text:p text:style-name="P4">* **Cognitive Reframing:**</text:p>
      <text:p text:style-name="P4"><text:s text:c="4"/>* **Strategy:** Change the internal dialogue. Instead of thinking, "I must get a perfect score," reframe it to, "I will apply my best strategy for every question I encounter." Focus on the *process*, not the *outcome*.</text:p>
      <text:p text:style-name="P4"/>
      <text:p text:style-name="P4"><text:soft-page-break/>### 2. Enhance Transferability (Improving Application Skills)</text:p>
      <text:p text:style-name="P3"/>
      <text:p text:style-name="P12">BIOMISTRAL :</text:p>
      <text:p text:style-name="P5">There could be several reasons why a student may perform differently on practice tests compared to actual exams:</text:p>
      <text:p text:style-name="P5"/>
      <text:p text:style-name="P5">1. Lack of motivation: Students who lack motivation may not put their best effort into practice tests, leading to artificially high scores. However, they may give their all during actual exams, causing them to underperform. Strategies to address this include setting realistic goals and rewards for achieving them, finding ways to make studying more enjoyable, and using positive self-talk.</text:p>
      <text:p text:style-name="P5">2. Anxiety: Students who experience test anxiety may perform poorly on actual exams despite performing well on practice tests. Strategies to reduce anxiety include practicing relaxation techniques such as deep breathing or meditation, finding ways to cope with stress (e.g., exercise), talking to a therapist about anxiety, and preparing ahead of time.</text:p>
      <text:p text:style-name="P5">3. Procrastination: Students who procrastinate may not study effectively until it is too late, causing them to underperform on actual exams despite having performed well on practice tests. Strategies to overcome procrastination include breaking up study sessions into smaller chunks over time, setting achievable deadlines, and creating a conducive study environment.</text:p>
      <text:p text:style-name="P5">4. Overconfidence: Students who are overconfident may not take practice tests seriously, leading to artificially low scores. However, when faced with an actual exam, they may feel more prepared and confident, causing them to overestimate their abilities and perform poorly. Strategies to combat overconfidence include monitoring progress regularly, getting feedback, and acknowledging weaknesses.</text:p>
      <text:p text:style-name="P5">5. Poor time management: Students who struggle with managing their time effectively may perform poorly on actual exams despite performing well on practice tests. Strategies to improve time management include using a planner, prioritizing tasks, eliminating distractions, and breaking up study sessions into manageable chunks.</text:p>
      <text:p text:style-name="P5"/>
      <text:p text:style-name="P12">FALCON3-MAMBA :</text:p>
      <text:p text:style-name="P5">There could be several factors contributing to a discrepancy where students perform exceptionally on mock or simulated examinations, yet struggle with real-life assessments:</text:p>
      <text:p text:style-name="P5"/>
      <text:p text:style-name="P5">### Psychological Factors </text:p>
      <text:p text:style-name="P5">**1.</text:p>
      <text:p text:style-name="P5">** Test Anxiety/Stress:** The pressure of an exam environment—whether it's due date proximity stress for schoolwork versus high stakes like job interviews--can significantly impact cognitive functions such as memory recall under time constraints which might not manifest during less pressured study sessions.</text:p>
      <text:p text:style-name="P5">*Solution:* Implementing relaxation techniques before testing situations; practicing mindfulness exercises regularly may reduce anxiety levels over repeated exposure until they become second nature when facing stressful scenarios directly relatedly linked towards academic success metrics.</text:p>
      <text:p text:style-name="P5">.</text:p>
      <text:p text:style-name="P5">*2)* Lack Of Familiarity With Exam Format Or Conditions*: Students often get accustomed only through repetitive training methods without fully simulating all aspects including timing restrictions etc.</text:p>
      <text:p text:style-name="P5">, leading up till D day leaving them unprepared mentally despite having mastered content knowledge theoretically*.</text:p>
      <text:p text:style-name="P5"><text:s/>Solution): Simulate realistic conditions closer mirror those encountered come assessment period e g timed quizzes instead o f open book ones if latter format used predominantly throughout semester course work assignments marking scheme reflects same urgency level expectations set forth by final evaluations conducted professionally outside educational institutions boundaries too wide encompassing vast array subjects spanning multiple disciplines requiring multi faceted skills sets <text:soft-page-break/>honed collectively overtime rather than isolated instances heretofore experienced individually thus far along journey learning curve traversed so diligently pursued since early childhood years past present future inclusive holistic development perspective taken account comprehensive manner fashion covering every conceivable angle possibility left unexplored awaiting discovery potential hidden depths lying dormant ready burst onto scene</text:p>
      <text:p text:style-name="P3"/>
      <text:p text:style-name="P6">LATENCY METRICES:</text:p>
      <table:table table:name="Table4" table:style-name="Table4">
        <table:table-column table:style-name="Table4.A"/>
        <table:table-column table:style-name="Table4.B"/>
        <table:table-column table:style-name="Table4.A"/>
        <table:table-column table:style-name="Table4.B"/>
        <table:table-column table:style-name="Table4.E"/>
        <table:table-row>
          <table:table-cell table:style-name="Table4.A1" office:value-type="string">
            <text:p text:style-name="P144"/>
          </table:table-cell>
          <table:table-cell table:style-name="Table4.A1" office:value-type="string">
            <text:p text:style-name="P129">COBRA MAMBA</text:p>
          </table:table-cell>
          <table:table-cell table:style-name="Table4.A1" office:value-type="string">
            <text:p text:style-name="P129">GEMMA-2B</text:p>
          </table:table-cell>
          <table:table-cell table:style-name="Table4.A1" office:value-type="string">
            <text:p text:style-name="P129">BIOMISTRAL-7B</text:p>
          </table:table-cell>
          <table:table-cell table:style-name="Table4.E1" office:value-type="string">
            <text:p text:style-name="P133">FALCON3-MAMBA-7B</text:p>
          </table:table-cell>
        </table:table-row>
        <table:table-row>
          <table:table-cell table:style-name="Table4.A2" office:value-type="string">
            <text:p text:style-name="P129">TTFT</text:p>
          </table:table-cell>
          <table:table-cell table:style-name="Table4.A2" office:value-type="string">
            <text:p text:style-name="P136">0.007</text:p>
          </table:table-cell>
          <table:table-cell table:style-name="Table4.A2" office:value-type="string">
            <text:p text:style-name="P136">0.004</text:p>
          </table:table-cell>
          <table:table-cell table:style-name="Table4.A2" office:value-type="string">
            <text:p text:style-name="P136">0.004</text:p>
          </table:table-cell>
          <table:table-cell table:style-name="Table4.E2" office:value-type="string">
            <text:p text:style-name="P136">0.010</text:p>
          </table:table-cell>
        </table:table-row>
        <table:table-row>
          <table:table-cell table:style-name="Table4.A2" office:value-type="string">
            <text:p text:style-name="P129">E2E Latency</text:p>
          </table:table-cell>
          <table:table-cell table:style-name="Table4.A2" office:value-type="string">
            <text:p text:style-name="P136">0.906</text:p>
          </table:table-cell>
          <table:table-cell table:style-name="Table4.A2" office:value-type="string">
            <text:p text:style-name="P145">33.237</text:p>
          </table:table-cell>
          <table:table-cell table:style-name="Table4.A2" office:value-type="string">
            <text:p text:style-name="P145">14.595</text:p>
          </table:table-cell>
          <table:table-cell table:style-name="Table4.E2" office:value-type="string">
            <text:p text:style-name="P136">19.650</text:p>
          </table:table-cell>
        </table:table-row>
        <table:table-row table:style-name="Table4.4">
          <table:table-cell table:style-name="Table4.A2" office:value-type="string">
            <text:p text:style-name="P129">Generation Time</text:p>
          </table:table-cell>
          <table:table-cell table:style-name="Table4.A2" office:value-type="string">
            <text:p text:style-name="P136">0.899</text:p>
          </table:table-cell>
          <table:table-cell table:style-name="Table4.A2" office:value-type="string">
            <text:p text:style-name="P145">33.233</text:p>
          </table:table-cell>
          <table:table-cell table:style-name="Table4.A2" office:value-type="string">
            <text:p text:style-name="P145">14.591</text:p>
          </table:table-cell>
          <table:table-cell table:style-name="Table4.E2" office:value-type="string">
            <text:p text:style-name="P136">19.639</text:p>
          </table:table-cell>
        </table:table-row>
        <table:table-row table:style-name="Table4.4">
          <table:table-cell table:style-name="Table4.A2" office:value-type="string">
            <text:p text:style-name="P138">Throughput</text:p>
          </table:table-cell>
          <table:table-cell table:style-name="Table4.A2" office:value-type="string">
            <text:p text:style-name="P136">30.03</text:p>
          </table:table-cell>
          <table:table-cell table:style-name="Table4.A2" office:value-type="string">
            <text:p text:style-name="P136">3<text:span text:style-name="T42">0.81</text:span> tokens/sec</text:p>
          </table:table-cell>
          <table:table-cell table:style-name="Table4.A2" office:value-type="string">
            <text:p text:style-name="P136">3<text:span text:style-name="T42">2.42</text:span> tokens/sec</text:p>
          </table:table-cell>
          <table:table-cell table:style-name="Table4.E2" office:value-type="string">
            <text:p text:style-name="P136">26.07tokens/sec</text:p>
          </table:table-cell>
        </table:table-row>
        <table:table-row table:style-name="Table4.4">
          <table:table-cell table:style-name="Table4.A2" office:value-type="string">
            <text:p text:style-name="P140">Words length</text:p>
          </table:table-cell>
          <table:table-cell table:style-name="Table4.A2" office:value-type="string">
            <text:p text:style-name="P136">24</text:p>
          </table:table-cell>
          <table:table-cell table:style-name="Table4.A2" office:value-type="string">
            <text:p text:style-name="P145">698</text:p>
          </table:table-cell>
          <table:table-cell table:style-name="Table4.A2" office:value-type="string">
            <text:p text:style-name="P145">361</text:p>
          </table:table-cell>
          <table:table-cell table:style-name="Table4.E2" office:value-type="string">
            <text:p text:style-name="P136">283</text:p>
          </table:table-cell>
        </table:table-row>
        <table:table-row table:style-name="Table4.4">
          <table:table-cell table:style-name="Table4.A2" office:value-type="string">
            <text:p text:style-name="P140">Characters</text:p>
          </table:table-cell>
          <table:table-cell table:style-name="Table4.A2" office:value-type="string">
            <text:p text:style-name="P136">118</text:p>
          </table:table-cell>
          <table:table-cell table:style-name="Table4.A2" office:value-type="string">
            <text:p text:style-name="P145">4993</text:p>
          </table:table-cell>
          <table:table-cell table:style-name="Table4.A2" office:value-type="string">
            <text:p text:style-name="P145">2323</text:p>
          </table:table-cell>
          <table:table-cell table:style-name="Table4.E2" office:value-type="string">
            <text:p text:style-name="P145">3423</text:p>
          </table:table-cell>
        </table:table-row>
      </table:table>
      <text:p text:style-name="P120"/>
      <text:p text:style-name="P115"/>
      <text:p text:style-name="P39"/>
      <text:p text:style-name="P39"/>
      <text:p text:style-name="P39"/>
      <text:p text:style-name="P39"/>
      <text:p text:style-name="P40">Prompt <text:span text:style-name="T45">5</text:span>: <text:span text:style-name="T37">A company has two options. Option A gives guarenteed profits of 50,000 rupees. Option B has 60% chance of earning 1,00,000 rupees and 40% chance of losing 20,000 rupees . Which options should the company choose ? Explain using expected value calculation and also consider factors beyod just numbers . </text:span></text:p>
      <text:p text:style-name="P40"><text:span text:style-name="T37"/></text:p>
      <text:p text:style-name="P90">COBRA-MAMBA : </text:p>
      <text:p text:style-name="P92">- [A] The Company can take option a as it will have guaranteed profit which is more than half (i.e., if they chose this option then there are chances that their total earnings would equal to Rs X) so we need not calculate EV for both OPTIONs here since one outlier already exists in terms or revenue earned by choosing first alternative i.e , <text:s/>option b where its probability = P(Profit &gt; Total Revenue)/P((TotalRevenue&gt;X))= p/q =&gt;p^3-x*p+c=&gt; x= c/(p^3-(a)^(-n)-b )</text:p>
      <text:p text:style-name="P46"><text:span text:style-name="T33"/></text:p>
      <text:p text:style-name="P90">GEMMA4-E2b: </text:p>
      <text:p text:style-name="P92">Here is a detailed analysis to help the company decide between Option A and Option B.</text:p>
      <text:p text:style-name="P46"><text:span text:style-name="T33"/></text:p>
      <text:p text:style-name="P92">## 1. Expected Value Calculation (The Quantitative Analysis)</text:p>
      <text:p text:style-name="P92">The expected value (EV) is a statistical measure that represents the average outcome if an event were to be repeated many times. It is calculated by multiplying each possible outcome by its probability and summing the results.</text:p>
      <text:p text:style-name="P46"><text:span text:style-name="T33"/></text:p>
      <text:p text:style-name="P92">### Option A: Guaranteed Profit</text:p>
      <text:p text:style-name="P92">* <text:s text:c="2"/>**Outcome:** 50,000 rupees</text:p>
      <text:p text:style-name="P92">* <text:s text:c="2"/>**Probability:** 100% (or 1.0)</text:p>
      <text:p text:style-name="P92">* <text:s text:c="2"/>**Expected Value (EV_A):**</text:p>
      <text:p text:style-name="P92"><text:s text:c="4"/>$$\text{EV}_A = (50,000 \times 1.0) = \text{50,000 rupees}$$</text:p>
      <text:p text:style-name="P46"><text:span text:style-name="T33"/></text:p>
      <text:p text:style-name="P92">### Option B: Risky Option</text:p>
      <text:p text:style-name="P92">Option B has two possible outcomes:</text:p>
      <text:p text:style-name="P92"><text:soft-page-break/>1. <text:s/>**Gain:** 1,00,000 rupees with a probability of 60% (0.60)</text:p>
      <text:p text:style-name="P92">2. <text:s/>**Loss:** -20,000 rupees (a loss) with a probability of 40% (0.40)</text:p>
      <text:p text:style-name="P46"><text:span text:style-name="T33"/></text:p>
      <text:p text:style-name="P92">* <text:s text:c="2"/>**Expected Value (EV_B):**</text:p>
      <text:p text:style-name="P92"><text:s text:c="4"/>$$\text{EV}_B = (\text{Gain} \times \text{Probability of Gain}) + (\text{Loss} \times \text{Probability of Loss})$$</text:p>
      <text:p text:style-name="P92"><text:s text:c="4"/>$$\text{EV}_B = (1,00,000 \times 0.60) + (-20,000 \times 0.40)$$</text:p>
      <text:p text:style-name="P92"><text:s text:c="4"/>$$\text{EV}_B = 60,000 + (-8,000)$$</text:p>
      <text:p text:style-name="P92"><text:s text:c="4"/>$$\text{EV}_B = 52,000 \text{ rupees}$$</text:p>
      <text:p text:style-name="P46"><text:span text:style-name="T33"/></text:p>
      <text:p text:style-name="P92">### Comparison of Expected Values</text:p>
      <text:p text:style-name="P92">* <text:s text:c="2"/>**EV of Option A:** 50,000 rupees</text:p>
      <text:p text:style-name="P92">* <text:s text:c="2"/>**EV of Option B:** 52,000 rupees</text:p>
      <text:p text:style-name="P46"><text:span text:style-name="T33"/></text:p>
      <text:p text:style-name="P92">**Conclusion based purely on Expected Value:**</text:p>
      <text:p text:style-name="P92">Based solely on the mathematical expectation, **Option B is slightly better** because its expected return (52,000) is higher than Option A's guaranteed return (50,000).</text:p>
      <text:p text:style-name="P46"><text:span text:style-name="T33"/></text:p>
      <text:p text:style-name="P92">## 2. Consideration of Factors Beyond Numbers (The Qualitative Analysis)</text:p>
      <text:p text:style-name="P46"><text:span text:style-name="T33"/></text:p>
      <text:p text:style-name="P92">While the expected value suggests Option B is mathematically superior, a real-world business decision involves risk tolerance, financial stability, and strategic goals.</text:p>
      <text:p text:style-name="P46"><text:span text:style-name="T33"/></text:p>
      <text:p text:style-name="P92">### A. Risk Tolerance and Financial Stability</text:p>
      <text:p text:style-name="P92">* <text:s text:c="2"/>**Option A (Guaranteed):** This option is ideal for companies with **low risk tolerance**, tight cash flow, or those needing predictable results to meet fixed obligations (like payroll or debt payments). The certainty of 50,000 rupees provides a stable foundation.</text:p>
      <text:p text:style-name="P92">* <text:s text:c="2"/>**Option B (Risky):** This option involves a **risk of loss** (losing 20,000 rupees). The company must be confident that it can absorb this loss without jeopardizing its solvency. If the company is fragile, this risk could be catastrophic.</text:p>
      <text:p text:style-name="P46"><text:span text:style-name="T33"/></text:p>
      <text:p text:style-name="P92">### B. Strategic Goals</text:p>
      <text:p text:style-name="P92">* <text:s text:c="2"/>**If the goal is stability and capital preservation:** Option A is the clear choice.</text:p>
      <text:p text:style-name="P92">* <text:s text:c="2"/>**If the goal is maximizing potential return (and the company can handle volatility):** Option B is attractive, as it offers a higher potential upside (1,00,000 rupees).</text:p>
      <text:p text:style-name="P46"><text:span text:style-name="T33"/></text:p>
      <text:p text:style-name="P92">### C. Context of the Loss</text:p>
      <text:p text:style-name="P92">The magnitude of the loss matters relative to the company's resources:</text:p>
      <text:p text:style-name="P92">* <text:s text:c="2"/>If losing 20,000 rupees is a minor setback, Option B is acceptable.</text:p>
      <text:p text:style-name="P92">* <text:s text:c="2"/>If losing 20,000 rupees would cause the company to miss a critical deadline, default on a loan, or face bankruptcy, then **Option A must be chosen**, regardless of the slightly higher expected value of Option B.</text:p>
      <text:p text:style-name="P46"><text:span text:style-name="T33"/></text:p>
      <text:p text:style-name="P92">## Final Recommendation</text:p>
      <text:p text:style-name="P92">The decision hinges entirely on the **company's risk appetite and financial situation.**</text:p>
      <text:p text:style-name="P46"><text:span text:style-name="T33"/></text:p>
      <text:p text:style-name="P92">1. <text:s/>**Choose Option A if:** The company prioritizes **security, stability, and predictability**. If the company cannot afford to lose any money, the guaranteed 50,000 rupees is the safer and more prudent choice.</text:p>
      <text:p text:style-name="P92">2. <text:s/>**Choose Option B if:** The company has a **moderate to high risk tolerance** and is willing to accept the possibility of a loss in exchange for a slightly higher potential average return. Since <text:soft-page-break/>the expected value is higher (52,000 vs. 50,000), it is mathematically superior *if* the risk is acceptable.</text:p>
      <text:p text:style-name="P46"><text:span text:style-name="T33"/></text:p>
      <text:p text:style-name="P92">**In summary:** **Option B is mathematically preferred, but Option A is strategically safer.** The company must weigh the **5,000 rupee difference in expected value** against the **risk of losing 20,000 rupees.**</text:p>
      <text:p text:style-name="P46"><text:span text:style-name="T33"/></text:p>
      <text:p text:style-name="P46"><text:span text:style-name="T33"/></text:p>
      <text:p text:style-name="P91">BIOMISTRAL:</text:p>
      <text:p text:style-name="P93">To determine which option is better for a company to choose between options A and B, we need to calculate their expected values. The expected value is calculated by multiplying each possible outcome with its probability and then summing up all these products.</text:p>
      <text:p text:style-name="P47"><text:span text:style-name="T33"/></text:p>
      <text:p text:style-name="P93">Option A:</text:p>
      <text:p text:style-name="P93">Profit = 50,000 rupees</text:p>
      <text:p text:style-name="P47"><text:span text:style-name="T33"/></text:p>
      <text:p text:style-name="P93">Expected value of option A = Profit \* Probability = 50,000 \* 1 = 50,000 rupees</text:p>
      <text:p text:style-name="P47"><text:span text:style-name="T33"/></text:p>
      <text:p text:style-name="P93">Option B:</text:p>
      <text:p text:style-name="P93">Possible outcomes: Winning 1,00,000 rupees or losing 20,000 rupees</text:p>
      <text:p text:style-name="P93">Probabilities: 60% chance of winning 1,00,000 rupees and 40% chance of losing 20,000 rupees .</text:p>
      <text:p text:style-name="P47"><text:span text:style-name="T33"/></text:p>
      <text:p text:style-name="P93">Expected value of option B = (Winning 1,00,000 rupees) \* (Probability of winning 1,00,000 rupees) + (Losing 20,000 rupees) \* (Probability of losing 20,000 rupees) = (1,00,000) \* 0.6 + (-20,000) \* 0.4 = 60,000 - 8,000 = 52,000 rupees.</text:p>
      <text:p text:style-name="P47"><text:span text:style-name="T33"/></text:p>
      <text:p text:style-name="P93">Based on the expected value calculations, option A seems to be the better choice as it has an expected value of 50,000 rupees compared to option B's expected value of 52,000 rupees. However, it is important to note that there are other factors to consider beyond just the monetary gain or loss associated with each option. These may include the impact of the decision on the company's long-term strategy, potential risks associated with one option over the other, and any other relevant factors that may not be immediately apparent from the given information.</text:p>
      <text:p text:style-name="P47"><text:span text:style-name="T33"/></text:p>
      <text:p text:style-name="P91">FALCON3-MAMBA:</text:p>
      <text:p text:style-name="P93">To determine which option is more favorable for a business based on potential outcomes alone without considering other qualitative aspects such as risk tolerance or strategic goals—we can use Expected Value calculations to compare Options **Option-B**.</text:p>
      <text:p text:style-name="P47"><text:span text:style-name="T33"/></text:p>
      <text:p text:style-name="P93">### Calculating Theoretical Outcomes: </text:p>
      <text:p text:style-name="P47"><text:span text:style-name="T33"/></text:p>
      <text:p text:style-name="P93">#### For both scenarios we calculate their respective expectations mathematically first before diving into considerations beyond pure financials; </text:p>
      <text:p text:style-name="P93">*For simplicity sake let's assume probabilities add up perfectly i.</text:p>
      <text:p text:style-name="P93">,e.</text:p>
      <text:p text:style-name="P93">* P(success)P(*profit*)+[p*(loss)]=100%.</text:p>
      <text:p text:style-name="P93"><text:s/>This assumption holds true here since there are only Success/Failure Scenarios with no possibility in between).</text:p>
      <text:p text:style-name="P47"><text:span text:style-name="T33"/></text:p>
      <text:p text:style-name="P47"><text:span text:style-name="T33"/></text:p>
      <text:p text:style-name="P93"><text:s text:c="5"/>E_option\_a <text:s/></text:p>
      <text:p text:style-name="P93"><text:s text:c="5"/>\[E_{optiona}=\text{Guaranteed Profit}\] </text:p>
      <text:p text:style-name="P93"><text:s text:c="5"/>\( <text:s text:c="2"/>\Rightarrow <text:s text:c="3"/>\) <text:s text:c="4"/>\(\boxed{\$5000}=</text:p>
      <text:p text:style-name="P93"><text:soft-page-break/><text:s text:c="49"/>rac{}{{}} <text:s text:c="5"/>extbf{})\]</text:p>
      <text:p text:style-name="P47"><text:span text:style-name="T33"/></text:p>
      <text:p text:style-name="P93"><text:s text:c="5"/>Now calculating Expectation Of Optiionb Using Given Probabilities And Payoffs We Get.</text:p>
      <text:p text:style-name="P47"><text:span text:style-name="T33"/></text:p>
      <text:p text:style-name="P93"><text:s text:c="5"/>Let X Represent Random Variable Denoting Outcome From Choosing Oprtion b Then.</text:p>
      <text:p text:style-name="P47"><text:span text:style-name="T33"/></text:p>
      <text:p text:style-name="P93"><text:s text:c="8"/>$$X=oxplus}{probability}(Success)*(\mathbf{$})+(ProbabiliytOfFailue)(Loss)\quad Where Loss=-200k\\</text:p>
      <text:p text:style-name="P93"><text:s text:c="8"/>Substituting Known Values In Above Equations Gives Us.</text:p>
      <text:p text:style-name="P93">.</text:p>
      <text:p text:style-name="P93">.</text:p>
      <text:p text:style-name="P47"><text:span text:style-name="T33"/></text:p>
      <text:p text:style-name="P93"><text:s text:c="11"/>x=(060times10^5)+[(040imes(-2xx105))]=600x-(800)=520xthereforeexpectedvalueofchoosingoptonbis510</text:p>
      <text:p text:style-name="P41"/>
      <text:p text:style-name="P7">LATENCY METRICES :</text:p>
      <text:p text:style-name="P41"/>
      <text:p text:style-name="P41"/>
      <table:table table:name="Table5" table:style-name="Table5">
        <table:table-column table:style-name="Table5.A"/>
        <table:table-column table:style-name="Table5.B"/>
        <table:table-column table:style-name="Table5.A"/>
        <table:table-column table:style-name="Table5.B"/>
        <table:table-column table:style-name="Table5.E"/>
        <table:table-row>
          <table:table-cell table:style-name="Table5.A1" office:value-type="string">
            <text:p text:style-name="P73"/>
          </table:table-cell>
          <table:table-cell table:style-name="Table5.A1" office:value-type="string">
            <text:p text:style-name="P57">COBRA MAMBA</text:p>
          </table:table-cell>
          <table:table-cell table:style-name="Table5.A1" office:value-type="string">
            <text:p text:style-name="P57">GEMMA-2B</text:p>
          </table:table-cell>
          <table:table-cell table:style-name="Table5.A1" office:value-type="string">
            <text:p text:style-name="P57">BIOMISTRAL-7B</text:p>
          </table:table-cell>
          <table:table-cell table:style-name="Table5.E1" office:value-type="string">
            <text:p text:style-name="P70">FALCON3-MAMBA-7B</text:p>
          </table:table-cell>
        </table:table-row>
        <table:table-row>
          <table:table-cell table:style-name="Table5.A2" office:value-type="string">
            <text:p text:style-name="P57">TTFT</text:p>
          </table:table-cell>
          <table:table-cell table:style-name="Table5.A2" office:value-type="string">
            <text:p text:style-name="P74">0.007</text:p>
          </table:table-cell>
          <table:table-cell table:style-name="Table5.A2" office:value-type="string">
            <text:p text:style-name="P74">0.004</text:p>
          </table:table-cell>
          <table:table-cell table:style-name="Table5.A2" office:value-type="string">
            <text:p text:style-name="P74">0.004</text:p>
          </table:table-cell>
          <table:table-cell table:style-name="Table5.E2" office:value-type="string">
            <text:p text:style-name="P74">0.012</text:p>
          </table:table-cell>
        </table:table-row>
        <table:table-row>
          <table:table-cell table:style-name="Table5.A2" office:value-type="string">
            <text:p text:style-name="P57">E2E Latency</text:p>
          </table:table-cell>
          <table:table-cell table:style-name="Table5.A2" office:value-type="string">
            <text:p text:style-name="P74">0.906</text:p>
          </table:table-cell>
          <table:table-cell table:style-name="Table5.A2" office:value-type="string">
            <text:p text:style-name="P74">29.265</text:p>
          </table:table-cell>
          <table:table-cell table:style-name="Table5.A2" office:value-type="string">
            <text:p text:style-name="P74">6.371</text:p>
          </table:table-cell>
          <table:table-cell table:style-name="Table5.E2" office:value-type="string">
            <text:p text:style-name="P74">11.612</text:p>
          </table:table-cell>
        </table:table-row>
        <table:table-row table:style-name="Table5.4">
          <table:table-cell table:style-name="Table5.A2" office:value-type="string">
            <text:p text:style-name="P57">Generation Time</text:p>
          </table:table-cell>
          <table:table-cell table:style-name="Table5.A2" office:value-type="string">
            <text:p text:style-name="P74">0.899</text:p>
          </table:table-cell>
          <table:table-cell table:style-name="Table5.A2" office:value-type="string">
            <text:p text:style-name="P74">29.261</text:p>
          </table:table-cell>
          <table:table-cell table:style-name="Table5.A2" office:value-type="string">
            <text:p text:style-name="P74">6.367</text:p>
          </table:table-cell>
          <table:table-cell table:style-name="Table5.E2" office:value-type="string">
            <text:p text:style-name="P74">11.600</text:p>
          </table:table-cell>
        </table:table-row>
        <table:table-row table:style-name="Table5.4">
          <table:table-cell table:style-name="Table5.A2" office:value-type="string">
            <text:p text:style-name="P76">Throughput</text:p>
          </table:table-cell>
          <table:table-cell table:style-name="Table5.A2" office:value-type="string">
            <text:p text:style-name="P74">30.03</text:p>
          </table:table-cell>
          <table:table-cell table:style-name="Table5.A2" office:value-type="string">
            <text:p text:style-name="P74">34.99 tokens/sec</text:p>
          </table:table-cell>
          <table:table-cell table:style-name="Table5.A2" office:value-type="string">
            <text:p text:style-name="P74">38.64 tokens/sec</text:p>
          </table:table-cell>
          <table:table-cell table:style-name="Table5.E2" office:value-type="string">
            <text:p text:style-name="P74">28.80 tokens/sec</text:p>
          </table:table-cell>
        </table:table-row>
        <table:table-row table:style-name="Table5.4">
          <table:table-cell table:style-name="Table5.A2" office:value-type="string">
            <text:p text:style-name="P62">Words length</text:p>
          </table:table-cell>
          <table:table-cell table:style-name="Table5.A2" office:value-type="string">
            <text:p text:style-name="P74">24</text:p>
          </table:table-cell>
          <table:table-cell table:style-name="Table5.A2" office:value-type="string">
            <text:p text:style-name="P74">539</text:p>
          </table:table-cell>
          <table:table-cell table:style-name="Table5.A2" office:value-type="string">
            <text:p text:style-name="P74">153</text:p>
          </table:table-cell>
          <table:table-cell table:style-name="Table5.E2" office:value-type="string">
            <text:p text:style-name="P74">138</text:p>
          </table:table-cell>
        </table:table-row>
        <table:table-row table:style-name="Table5.4">
          <table:table-cell table:style-name="Table5.A2" office:value-type="string">
            <text:p text:style-name="P62">Characters</text:p>
          </table:table-cell>
          <table:table-cell table:style-name="Table5.A2" office:value-type="string">
            <text:p text:style-name="P74">118</text:p>
          </table:table-cell>
          <table:table-cell table:style-name="Table5.A2" office:value-type="string">
            <text:p text:style-name="P74">3638</text:p>
          </table:table-cell>
          <table:table-cell table:style-name="Table5.A2" office:value-type="string">
            <text:p text:style-name="P74">938</text:p>
          </table:table-cell>
          <table:table-cell table:style-name="Table5.E2" office:value-type="string">
            <text:p text:style-name="P74">1297</text:p>
          </table:table-cell>
        </table:table-row>
      </table:table>
      <text:p text:style-name="P42"/>
      <text:p text:style-name="P41"/>
      <text:p text:style-name="P48"/>
      <text:p text:style-name="P51">Prompt <text:span text:style-name="T45">6</text:span>:</text:p>
      <text:p text:style-name="P52">""Solve this spam filter math problem step-by-step:</text:p>
      <text:p text:style-name="P54"/>
      <text:p text:style-name="P53">- Context: A company receives 1,000 emails. Only 1% of them are actually spam.</text:p>
      <text:p text:style-name="P53">- Model Performance: The spam filter has a 90% Sensitivity (catches 90% of real spam) and 90% Specificity (correctly flags 90% of safe emails).</text:p>
      <text:p text:style-name="P54"/>
      <text:p text:style-name="P53">1. Out of the 1,000 emails, calculate the exact number of:</text:p>
      <text:p text:style-name="P53">- True Positives (Spam correctly caught)</text:p>
      <text:p text:style-name="P53">- False Positives (Safe emails wrongly blocked)</text:p>
      <text:p text:style-name="P54"/>
      <text:p text:style-name="P53">2. Calculate the Precision: If the filter flags an email as spam, what is the exact percentage chance that it is actually spam? (Formula: True Positives / Total Flagged Emails)</text:p>
      <text:p text:style-name="P52">"""</text:p>
      <text:p text:style-name="P95"/>
      <text:list text:style-name="L4">
        <text:list-item>
          <text:p text:style-name="P94">CobraMamba failed to respond or calculate the desired values</text:p>
        </text:list-item>
        <text:list-item>
          <text:p text:style-name="P94">Gemma correctly calculated all the values along w<text:span text:style-name="T48">i</text:span>th explanation</text:p>
        </text:list-item>
        <text:list-item>
          <text:p text:style-name="P94">BioMistral also calculated the values but on multiple trials</text:p>
        </text:list-item>
        <text:list-item>
          <text:p text:style-name="P94">Falcon Mamba terribly failed and gave the worst response .</text:p>
        </text:list-item>
      </text:list>
      <text:p text:style-name="P44"><text:soft-page-break/></text:p>
      <text:p text:style-name="P44"/>
      <table:table table:name="Table6" table:style-name="Table6">
        <table:table-column table:style-name="Table6.A"/>
        <table:table-column table:style-name="Table6.B"/>
        <table:table-column table:style-name="Table6.A"/>
        <table:table-column table:style-name="Table6.B"/>
        <table:table-column table:style-name="Table6.E"/>
        <table:table-row>
          <table:table-cell table:style-name="Table6.A1" office:value-type="string">
            <text:p text:style-name="P77"/>
          </table:table-cell>
          <table:table-cell table:style-name="Table6.A1" office:value-type="string">
            <text:p text:style-name="P58">COBRA MAMBA</text:p>
          </table:table-cell>
          <table:table-cell table:style-name="Table6.A1" office:value-type="string">
            <text:p text:style-name="P58">GEMMA-2B</text:p>
          </table:table-cell>
          <table:table-cell table:style-name="Table6.A1" office:value-type="string">
            <text:p text:style-name="P58">BIOMISTRAL-7B</text:p>
          </table:table-cell>
          <table:table-cell table:style-name="Table6.E1" office:value-type="string">
            <text:p text:style-name="P71">FALCON3-MAMBA-7B</text:p>
          </table:table-cell>
        </table:table-row>
        <table:table-row>
          <table:table-cell table:style-name="Table6.A2" office:value-type="string">
            <text:p text:style-name="P58">TTFT</text:p>
          </table:table-cell>
          <table:table-cell table:style-name="Table6.A2" office:value-type="string">
            <text:p text:style-name="P75">0.00<text:span text:style-name="T41">7secs</text:span></text:p>
          </table:table-cell>
          <table:table-cell table:style-name="Table6.A2" office:value-type="string">
            <text:p text:style-name="P75">0.003</text:p>
          </table:table-cell>
          <table:table-cell table:style-name="Table6.A2" office:value-type="string">
            <text:p text:style-name="P75">0.004</text:p>
          </table:table-cell>
          <table:table-cell table:style-name="Table6.E2" office:value-type="string">
            <text:p text:style-name="P75">0.010</text:p>
          </table:table-cell>
        </table:table-row>
        <table:table-row>
          <table:table-cell table:style-name="Table6.A2" office:value-type="string">
            <text:p text:style-name="P58">E2E Latency</text:p>
          </table:table-cell>
          <table:table-cell table:style-name="Table6.A2" office:value-type="string">
            <text:p text:style-name="P76">1.144secs</text:p>
          </table:table-cell>
          <table:table-cell table:style-name="Table6.A2" office:value-type="string">
            <text:p text:style-name="P76">19.229</text:p>
          </table:table-cell>
          <table:table-cell table:style-name="Table6.A2" office:value-type="string">
            <text:p text:style-name="P75">6.<text:span text:style-name="T41">656</text:span></text:p>
          </table:table-cell>
          <table:table-cell table:style-name="Table6.E2" office:value-type="string">
            <text:p text:style-name="P75">17.288</text:p>
          </table:table-cell>
        </table:table-row>
        <table:table-row table:style-name="Table6.4">
          <table:table-cell table:style-name="Table6.A2" office:value-type="string">
            <text:p text:style-name="P58">Generation Time</text:p>
          </table:table-cell>
          <table:table-cell table:style-name="Table6.A2" office:value-type="string">
            <text:p text:style-name="P76">1.138secs</text:p>
          </table:table-cell>
          <table:table-cell table:style-name="Table6.A2" office:value-type="string">
            <text:p text:style-name="P76">19.226</text:p>
          </table:table-cell>
          <table:table-cell table:style-name="Table6.A2" office:value-type="string">
            <text:p text:style-name="P75">6.<text:span text:style-name="T41">652</text:span></text:p>
          </table:table-cell>
          <table:table-cell table:style-name="Table6.E2" office:value-type="string">
            <text:p text:style-name="P75">17.278</text:p>
          </table:table-cell>
        </table:table-row>
        <table:table-row table:style-name="Table6.4">
          <table:table-cell table:style-name="Table6.A2" office:value-type="string">
            <text:p text:style-name="P76">Throughput</text:p>
          </table:table-cell>
          <table:table-cell table:style-name="Table6.A2" office:value-type="string">
            <text:p text:style-name="P76">31.65 tokens/sec</text:p>
          </table:table-cell>
          <table:table-cell table:style-name="Table6.A2" office:value-type="string">
            <text:p text:style-name="P76">37.71 tokens/sec</text:p>
          </table:table-cell>
          <table:table-cell table:style-name="Table6.A2" office:value-type="string">
            <text:p text:style-name="P76">38.64 tokens/sec</text:p>
          </table:table-cell>
          <table:table-cell table:style-name="Table6.E2" office:value-type="string">
            <text:p text:style-name="P75">29.63 tokens/sec</text:p>
          </table:table-cell>
        </table:table-row>
        <table:table-row table:style-name="Table6.4">
          <table:table-cell table:style-name="Table6.A2" office:value-type="string">
            <text:p text:style-name="P63">Words length</text:p>
          </table:table-cell>
          <table:table-cell table:style-name="Table6.A2" office:value-type="string">
            <text:p text:style-name="P76">21</text:p>
          </table:table-cell>
          <table:table-cell table:style-name="Table6.A2" office:value-type="string">
            <text:p text:style-name="P76">311</text:p>
          </table:table-cell>
          <table:table-cell table:style-name="Table6.A2" office:value-type="string">
            <text:p text:style-name="P76">151</text:p>
          </table:table-cell>
          <table:table-cell table:style-name="Table6.E2" office:value-type="string">
            <text:p text:style-name="P75">65</text:p>
          </table:table-cell>
        </table:table-row>
        <table:table-row table:style-name="Table6.4">
          <table:table-cell table:style-name="Table6.A2" office:value-type="string">
            <text:p text:style-name="P63">Characters</text:p>
          </table:table-cell>
          <table:table-cell table:style-name="Table6.A2" office:value-type="string">
            <text:p text:style-name="P76">117</text:p>
          </table:table-cell>
          <table:table-cell table:style-name="Table6.A2" office:value-type="string">
            <text:p text:style-name="P76">2085</text:p>
          </table:table-cell>
          <table:table-cell table:style-name="Table6.A2" office:value-type="string">
            <text:p text:style-name="P76">798</text:p>
          </table:table-cell>
          <table:table-cell table:style-name="Table6.E2" office:value-type="string">
            <text:p text:style-name="P75">1887</text:p>
          </table:table-cell>
        </table:table-row>
      </table:table>
      <text:p text:style-name="P45"/>
      <text:p text:style-name="P45"/>
      <text:p text:style-name="P119">Prompt 7 : </text:p>
      <text:p text:style-name="P105">You are an expert clinical pharmacologist and emergency triage physician. Analyze the patient case below and answer the two questions exactly as instructed.</text:p>
      <text:p text:style-name="P105"/>
      <text:p text:style-name="P105">Patient Profile</text:p>
      <text:p text:style-name="P105">- Age/Sex: 45-year-old Female</text:p>
      <text:p text:style-name="P105">- Weight: 60 kg</text:p>
      <text:p text:style-name="P105">- Presenting Symptoms: Acute severe headache, neck stiffness, photophobia, and a temperature of 38.9°C (102°C). </text:p>
      <text:p text:style-name="P105">- Diagnostics: Lumbar puncture confirms Acute Bacterial Meningitis.</text:p>
      <text:p text:style-name="P105"/>
      <text:p text:style-name="P105">Clinical Parameters</text:p>
      <text:p text:style-name="P105">1. Triage Priority Scale: Level 1 (Resuscitation), Level 2 (Emergent), Level 3 (Urgent).</text:p>
      <text:p text:style-name="P105">2. Empiric Antibiotic Regimen: Ceftriaxone 40 mg/kg per dose, administered intravenously.</text:p>
      <text:p text:style-name="P105"/>
      <text:p text:style-name="P105">---</text:p>
      <text:p text:style-name="P105"/>
      <text:p text:style-name="P105">### Step 1: Dosage Calculation</text:p>
      <text:p text:style-name="P105">Calculate the exact single dose of Ceftriaxone in milligrams (mg) required for this 60 kg patient based on the clinical parameters provided. Show the simple multiplication formula.</text:p>
      <text:p text:style-name="P105"/>
      <text:p text:style-name="P105">### Step 2: Triage Classification</text:p>
      <text:p text:style-name="P105">Assign the correct Triage Priority Level (Level 1, 2, or 3) for this patient based on her presenting symptoms. Briefly provide a 1-sentence medical justification for your choice.</text:p>
      <text:p text:style-name="P105"/>
      <text:p text:style-name="P105">### Formatting Constraint:</text:p>
      <text:p text:style-name="P105">Begin your response directly with "### Step 1 Solutions:". Do not include introductory remarks or conversational filler.</text:p>
      <text:p text:style-name="P106"/>
      <text:p text:style-name="P106"/>
      <text:list text:style-name="L9">
        <text:list-item>
          <text:p text:style-name="P100">CobraMamba failed – gave random response line like “I am providing answer of only first”</text:p>
        </text:list-item>
        <text:list-item>
          <text:p text:style-name="P100">BioMistral gave proper response of both the steps <text:span text:style-name="T50">(best response)</text:span></text:p>
        </text:list-item>
        <text:list-item>
          <text:p text:style-name="P102">Gemma also calculated everything accurately.</text:p>
        </text:list-item>
        <text:list-item>
          <text:p text:style-name="P100">FalconMamba also failed</text:p>
        </text:list-item>
      </text:list>
      <text:p text:style-name="P101"/>
      <text:p text:style-name="P103"/>
      <text:p text:style-name="P103"/>
      <text:p text:style-name="P108"><text:soft-page-break/>BIOMISTRAL :</text:p>
      <text:p text:style-name="P103">### Step 1 Solutions:</text:p>
      <text:p text:style-name="P103">The weight is in kilograms (kg). The recommended dosage of Ceftriaxone for meningitis is 40 mg/kg per dose. So, for this 60 kg patient, the exact single dose required is: 40 mg/kg x 60 kg = 2400 mg. </text:p>
      <text:p text:style-name="P103"/>
      <text:p text:style-name="P103">### Step 2 Solution:</text:p>
      <text:p text:style-name="P103">The patient presents with acute severe headache, neck stiffness, photophobia, and a fever of 38.9°C (102°F). These symptoms indicate a high potential for rapid deterioration and require prompt treatment. Therefore, this patient should be classified under Level 1 (Resuscitation) of the Triage Priority Scale.<text:span text:style-name="T51">x</text:span></text:p>
      <text:p text:style-name="P106"/>
      <text:p text:style-name="P108">GEMMA :</text:p>
      <text:p text:style-name="P103">### Step 1 Solutions:</text:p>
      <text:p text:style-name="P103">Calculation: 40 mg/kg * 60 kg = 2400 mg</text:p>
      <text:p text:style-name="P103"/>
      <text:p text:style-name="P103">### Step 2 Solutions:</text:p>
      <text:p text:style-name="P103">Triage Priority Level: Level 1</text:p>
      <text:p text:style-name="P103">Justification: The patient presents with signs of sepsis and acute bacterial meningitis, which are life-threatening conditions requiring immediate resuscitation.</text:p>
      <text:p text:style-name="P106"/>
      <text:p text:style-name="P106"/>
      <table:table table:name="Table7" table:style-name="Table7">
        <table:table-column table:style-name="Table7.A"/>
        <table:table-column table:style-name="Table7.B"/>
        <table:table-column table:style-name="Table7.A"/>
        <table:table-column table:style-name="Table7.B"/>
        <table:table-column table:style-name="Table7.E"/>
        <table:table-row>
          <table:table-cell table:style-name="Table7.A1" office:value-type="string">
            <text:p text:style-name="P150"/>
          </table:table-cell>
          <table:table-cell table:style-name="Table7.A1" office:value-type="string">
            <text:p text:style-name="P132">COBRA MAMBA</text:p>
          </table:table-cell>
          <table:table-cell table:style-name="Table7.A1" office:value-type="string">
            <text:p text:style-name="P132">GEMMA-2B</text:p>
          </table:table-cell>
          <table:table-cell table:style-name="Table7.A1" office:value-type="string">
            <text:p text:style-name="P132">BIOMISTRAL-7B</text:p>
          </table:table-cell>
          <table:table-cell table:style-name="Table7.E1" office:value-type="string">
            <text:p text:style-name="P135">FALCON3-MAMBA-7B</text:p>
          </table:table-cell>
        </table:table-row>
        <table:table-row>
          <table:table-cell table:style-name="Table7.A2" office:value-type="string">
            <text:p text:style-name="P132">TTFT</text:p>
          </table:table-cell>
          <table:table-cell table:style-name="Table7.A2" office:value-type="string">
            <text:p text:style-name="P137">0.00<text:span text:style-name="T41">7secs</text:span></text:p>
          </table:table-cell>
          <table:table-cell table:style-name="Table7.A2" office:value-type="string">
            <text:p text:style-name="P137">0.00<text:span text:style-name="T49">4</text:span></text:p>
          </table:table-cell>
          <table:table-cell table:style-name="Table7.A2" office:value-type="string">
            <text:p text:style-name="P137">0.00<text:span text:style-name="T49">5</text:span></text:p>
          </table:table-cell>
          <table:table-cell table:style-name="Table7.E2" office:value-type="string">
            <text:p text:style-name="P137">0.01<text:span text:style-name="T49">3</text:span></text:p>
          </table:table-cell>
        </table:table-row>
        <table:table-row>
          <table:table-cell table:style-name="Table7.A2" office:value-type="string">
            <text:p text:style-name="P132">E2E Latency</text:p>
          </table:table-cell>
          <table:table-cell table:style-name="Table7.A2" office:value-type="string">
            <text:p text:style-name="P139">1.<text:span text:style-name="T49">853</text:span>secs</text:p>
          </table:table-cell>
          <table:table-cell table:style-name="Table7.A2" office:value-type="string">
            <text:p text:style-name="P151">2.676</text:p>
          </table:table-cell>
          <table:table-cell table:style-name="Table7.A2" office:value-type="string">
            <text:p text:style-name="P151">3.668</text:p>
          </table:table-cell>
          <table:table-cell table:style-name="Table7.E2" office:value-type="string">
            <text:p text:style-name="P137">1<text:span text:style-name="T49">9.651</text:span></text:p>
          </table:table-cell>
        </table:table-row>
        <table:table-row table:style-name="Table7.4">
          <table:table-cell table:style-name="Table7.A2" office:value-type="string">
            <text:p text:style-name="P132">Generation Time</text:p>
          </table:table-cell>
          <table:table-cell table:style-name="Table7.A2" office:value-type="string">
            <text:p text:style-name="P139">1.<text:span text:style-name="T49">846</text:span>secs</text:p>
          </table:table-cell>
          <table:table-cell table:style-name="Table7.A2" office:value-type="string">
            <text:p text:style-name="P151">2.672</text:p>
          </table:table-cell>
          <table:table-cell table:style-name="Table7.A2" office:value-type="string">
            <text:p text:style-name="P151">3.663</text:p>
          </table:table-cell>
          <table:table-cell table:style-name="Table7.E2" office:value-type="string">
            <text:p text:style-name="P151">19.638</text:p>
          </table:table-cell>
        </table:table-row>
        <table:table-row table:style-name="Table7.4">
          <table:table-cell table:style-name="Table7.A2" office:value-type="string">
            <text:p text:style-name="P139">Throughput</text:p>
          </table:table-cell>
          <table:table-cell table:style-name="Table7.A2" office:value-type="string">
            <text:p text:style-name="P139"><text:span text:style-name="T49">27.09</text:span> tokens/sec</text:p>
          </table:table-cell>
          <table:table-cell table:style-name="Table7.A2" office:value-type="string">
            <text:p text:style-name="P139"><text:span text:style-name="T49">27.69</text:span> tokens/sec</text:p>
          </table:table-cell>
          <table:table-cell table:style-name="Table7.A2" office:value-type="string">
            <text:p text:style-name="P139"><text:span text:style-name="T49">45.31</text:span> tokens/sec</text:p>
          </table:table-cell>
          <table:table-cell table:style-name="Table7.E2" office:value-type="string">
            <text:p text:style-name="P137">2<text:span text:style-name="T49">6.07</text:span> tokens/sec</text:p>
          </table:table-cell>
        </table:table-row>
        <table:table-row table:style-name="Table7.4">
          <table:table-cell table:style-name="Table7.A2" office:value-type="string">
            <text:p text:style-name="P143">Words length</text:p>
          </table:table-cell>
          <table:table-cell table:style-name="Table7.A2" office:value-type="string">
            <text:p text:style-name="P151">44</text:p>
          </table:table-cell>
          <table:table-cell table:style-name="Table7.A2" office:value-type="string">
            <text:p text:style-name="P151">41</text:p>
          </table:table-cell>
          <table:table-cell table:style-name="Table7.A2" office:value-type="string">
            <text:p text:style-name="P151">90</text:p>
          </table:table-cell>
          <table:table-cell table:style-name="Table7.E2" office:value-type="string">
            <text:p text:style-name="P151">53</text:p>
          </table:table-cell>
        </table:table-row>
        <table:table-row table:style-name="Table7.4">
          <table:table-cell table:style-name="Table7.A2" office:value-type="string">
            <text:p text:style-name="P143">Characters</text:p>
          </table:table-cell>
          <table:table-cell table:style-name="Table7.A2" office:value-type="string">
            <text:p text:style-name="P151">257</text:p>
          </table:table-cell>
          <table:table-cell table:style-name="Table7.A2" office:value-type="string">
            <text:p text:style-name="P139">2<text:span text:style-name="T49">77</text:span></text:p>
          </table:table-cell>
          <table:table-cell table:style-name="Table7.A2" office:value-type="string">
            <text:p text:style-name="P139"><text:span text:style-name="T49">552</text:span></text:p>
          </table:table-cell>
          <table:table-cell table:style-name="Table7.E2" office:value-type="string">
            <text:p text:style-name="P151">2181</text:p>
          </table:table-cell>
        </table:table-row>
      </table:table>
      <text:p text:style-name="P107"/>
      <text:p text:style-name="P106"/>
      <text:p text:style-name="P106"/>
      <text:p text:style-name="P106"/>
      <text:p text:style-name="P106"/>
      <text:p text:style-name="P43">OBSERVATIONS :</text:p>
      <text:p text:style-name="P43"/>
      <text:list text:style-name="L5">
        <text:list-item>
          <text:p text:style-name="P109"><text:span text:style-name="T38">TTFT of GEMMA-4-E2B is the lowest , fastest model to re</text:span><text:span text:style-name="T39">s</text:span><text:span text:style-name="T38">pond</text:span><text:span text:style-name="T40">s</text:span></text:p>
        </text:list-item>
        <text:list-item>
          <text:p text:style-name="P96">when keywords like brief/short <text:span text:style-name="T48">are</text:span> not mentioned in the input prompt then gemma response is very long due to which the E2E latency increases drastically.</text:p>
        </text:list-item>
        <text:list-item>
          <text:p text:style-name="P110"><text:span text:style-name="T35">Falcon3-mamba</text:span><text:span text:style-name="T30"> d</text:span><text:span text:style-name="T23">espite being a State Space Model (which should theoretically bypass transformer bottle-necking), it exhibits poor raw performance , likely due to unoptimized execution layers on local pipeline.</text:span></text:p>
        </text:list-item>
        <text:list-item>
          <text:p text:style-name="P112">Cobra Mamba gives mixed responses , as it is not trained model , the output heavily depends on the kind of prompt <text:s/>give <text:s/>and features of the input</text:p>
        </text:list-item>
        <text:list-item>
          <text:p text:style-name="P111">Falcon fails in mathematical prompts while generated relatively better response in theoretical inputs.</text:p>
        </text:list-item>
      </text:list>
      <text:p text:style-name="P35"/>
      <text:p text:style-name="P41"/>
      <text:p text:style-name="P39"><text:soft-page-break/><text:span text:style-name="T25">SOME OF THE COMMON </text:span><text:span text:style-name="T27">ISSUES </text:span><text:span text:style-name="T25">FROM THE ABOVE INPUTS/PROMPTS </text:span>:</text:p>
      <text:p text:style-name="P2"/>
      <text:list text:style-name="L6">
        <text:list-item>
          <text:p text:style-name="P97">Issues with CobraMamba :- <text:s text:c="7"/></text:p>
          <text:p text:style-name="P97"><text:s/>a) They do not know how to "answer" questions. <text:s text:c="7"/></text:p>
          <text:p text:style-name="P98"><text:s text:c="5"/>They try to make prompt look like an academic paper, a Jupyter notebook, or a textbook </text:p>
          <text:p text:style-name="P98"><text:s text:c="6"/>chapter, leading to messy, formatting-heavy outputs.</text:p>
          <text:p text:style-name="P97"><text:s/>b) if it gives response then the length of it is very less as compared to other 2 models</text:p>
          <text:p text:style-name="P97"><text:s/>c)Too old (3yrs ago)</text:p>
          <text:p text:style-name="P97"><text:s/>d) not a true/pure mamba model – built on open Llama-3B .</text:p>
        </text:list-item>
      </text:list>
      <text:p text:style-name="P49"><text:span text:style-name="T34"/></text:p>
      <text:list text:continue-numbering="true" text:style-name="L6">
        <text:list-item>
          <text:p text:style-name="P113"><text:span text:style-name="T33">The response given by gemma is good but it contains many </text:span><text:span text:style-name="T36">characters like *#$ for bold and heading like texts.</text:span></text:p>
        </text:list-item>
        <text:list-item>
          <text:p text:style-name="P98"><text:span text:style-name="T46">The reason Gemma cut off mid-response earlier was entirely due to the token length limitation. </text:span>The token length issue – if token length is increased to 512 or 1024 so that model can give complete answer , gemma is exceeding that limit as well. </text:p>
        </text:list-item>
        <text:list-item>
          <text:p text:style-name="P88"><text:span text:style-name="T47">After increasing the token length the responses by gemma are very big and incomplete so the best way to get a good response is by mentioning in the prompt to answer in brief and limited words.</text:span></text:p>
        </text:list-item>
        <text:list-item>
          <text:p text:style-name="P99">In FalconMamba first 2-3 paragraphs are coherent but degrades beyond that without proper kernel support.</text:p>
        </text:list-item>
        <text:list-item>
          <text:p text:style-name="P114"><text:span text:style-name="T33">The main issue for the execution of FalconMamba is that the GPU in the pc has CUDA 13.2 version and it needs a min of 12.8 <text:s/>version , but FalconMamba is best compatible with CUDA version 12.4 , hence the results are not up to mark and kernel errors are there.</text:span></text:p>
        </text:list-item>
      </text:list>
      <text:p text:style-name="P89"><text:span text:style-name="T34"/></text:p>
      <text:p text:style-name="P89"><text:span text:style-name="T34"/></text:p>
      <text:p text:style-name="P117"><text:span text:style-name="T47">T</text:span>HEORECTICAL VS MATHEMATICAL INPUT COMPARISON :</text:p>
      <text:p text:style-name="P104"/>
      <text:p text:style-name="P124"><text:span text:style-name="T33">Theoretical prompts : </text:span></text:p>
      <text:list text:style-name="L7">
        <text:list-item>
          <text:p text:style-name="P125"><text:span text:style-name="T33">All models attempt an answer</text:span></text:p>
        </text:list-item>
        <text:list-item>
          <text:p text:style-name="P126"><text:span text:style-name="T33">Gemma and BioMistral give structured detailed response</text:span></text:p>
        </text:list-item>
        <text:list-item>
          <text:p text:style-name="P126"><text:span text:style-name="T33">Cobra Mamba gives short but sometimes relevant responses</text:span></text:p>
        </text:list-item>
        <text:list-item>
          <text:p text:style-name="P126"><text:span text:style-name="T33">FalconMamba gives partially coherent responses with degeneration</text:span></text:p>
        </text:list-item>
      </text:list>
      <text:p text:style-name="P127"><text:span text:style-name="T33"/></text:p>
      <text:p text:style-name="P127"><text:span text:style-name="T33">Mathematical prompts :</text:span></text:p>
      <text:list text:style-name="L8">
        <text:list-item>
          <text:p text:style-name="P128"><text:span text:style-name="T33">CobraMamba fails 21-24 words no calculations</text:span></text:p>
        </text:list-item>
        <text:list-item>
          <text:p text:style-name="P128"><text:span text:style-name="T33">Gemma attmpts full mathematical working but takes very long</text:span></text:p>
        </text:list-item>
        <text:list-item>
          <text:p text:style-name="P128"><text:span text:style-name="T33">Biomistral gives good response with good speed but has slightly less accuracy than gemma</text:span></text:p>
        </text:list-item>
        <text:list-item>
          <text:p text:style-name="P128"><text:span text:style-name="T33">FalconMamba also fails just like CobraMamba , it somethimes tries to attempt but doesn’t do it properly. </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08T14:50:32.625688246</meta:creation-date>
    <dc:date>2026-06-22T16:04:35.530651298</dc:date>
    <meta:editing-duration>P9DT2H18M32S</meta:editing-duration>
    <meta:editing-cycles>22</meta:editing-cycles>
    <meta:generator>LibreOffice/24.2.7.2$Linux_X86_64 LibreOffice_project/420$Build-2</meta:generator>
    <meta:document-statistic meta:table-count="7" meta:image-count="0" meta:object-count="0" meta:page-count="18" meta:paragraph-count="574" meta:word-count="6553" meta:character-count="46624" meta:non-whitespace-character-count="40349"/>
  </office:meta>
</office:document-meta>
</file>